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2.1319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2.8382in"/>
    </style:style>
    <style:style style:name="co8" style:family="table-column">
      <style:table-column-properties fo:break-before="auto" style:column-width="3.2291in"/>
    </style:style>
    <style:style style:name="co9" style:family="table-column">
      <style:table-column-properties fo:break-before="auto" style:column-width="3.898in"/>
    </style:style>
    <style:style style:name="co10" style:family="table-column">
      <style:table-column-properties fo:break-before="auto" style:column-width="3.8925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2.1in"/>
    </style:style>
    <style:style style:name="co15" style:family="table-column">
      <style:table-column-properties fo:break-before="auto" style:column-width="5.25in"/>
    </style:style>
    <style:style style:name="ro1" style:family="table-row">
      <style:table-row-properties style:row-height="0.6319in" fo:break-before="auto" style:use-optimal-row-height="false"/>
    </style:style>
    <style:style style:name="ro2" style:family="table-row">
      <style:table-row-properties style:row-height="2.5in" fo:break-before="auto" style:use-optimal-row-height="false"/>
    </style:style>
    <style:style style:name="ro3" style:family="table-row">
      <style:table-row-properties style:row-height="3.5in" fo:break-before="auto" style:use-optimal-row-height="false"/>
    </style:style>
    <style:style style:name="ro4" style:family="table-row">
      <style:table-row-properties style:row-height="4in" fo:break-before="auto" style:use-optimal-row-height="false"/>
    </style:style>
    <style:style style:name="ro5" style:family="table-row">
      <style:table-row-properties style:row-height="1.7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2201in" fo:break-before="auto" style:use-optimal-row-height="false"/>
    </style:style>
    <style:style style:name="ro10" style:family="table-row">
      <style:table-row-properties style:row-height="0.4346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f4e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5308d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wrap-option="wrap" style:vertical-align="middle"/>
      <style:text-properties style:font-name="Cambria1" fo:font-size="11pt" style:font-size-asian="11pt" style:font-size-complex="11pt"/>
    </style:style>
    <style:style style:name="ce10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69a2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b277d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b277d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b277d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b277d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bf3fb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ackground-color="#1f4e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">
      <style:table-cell-properties fo:background-color="#1f4e7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Noto Sans Devanagari" style:font-size-complex="11pt" style:font-style-complex="normal" style:font-weight-complex="bold"/>
    </style:style>
    <style:style style:name="ce32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Tit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Related Use Case</text:p>
          </table:table-cell>
          <table:table-cell table:style-name="ce2" office:value-type="string" calcext:value-type="string">
            <text:p>Scenario Typ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7" office:value-type="string" calcext:value-type="string">
            <text:p>TC-REG-01</text:p>
          </table:table-cell>
          <table:table-cell table:style-name="ce10" office:value-type="string" calcext:value-type="string">
            <text:p>User Registration with Valid Data</text:p>
          </table:table-cell>
          <table:table-cell table:style-name="ce11" office:value-type="string" calcext:value-type="string">
            <text:p>User Registration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not registered; Sign-up page is accessible; System is running</text:p>
          </table:table-cell>
          <table:table-cell table:style-name="ce10" office:value-type="string" calcext:value-type="string">
            <text:p>Username: newuser_001</text:p>
            <text:p>Email: newuser001@company.com</text:p>
            <text:p>Password: ValidPass123!</text:p>
            <text:p>First Name: John</text:p>
            <text:p>Last Name: Doe</text:p>
            <text:p>Role: Staff</text:p>
            <text:p>Phone: +1-555-0100</text:p>
          </table:table-cell>
          <table:table-cell table:style-name="ce10" office:value-type="string" calcext:value-type="string">
            <text:p>1. Navigate to /sign-up page</text:p>
            <text:p>2. Enter username "newuser_001"</text:p>
            <text:p>3. Enter email "newuser001@company.com"</text:p>
            <text:p>4. Enter password "ValidPass123!"</text:p>
            <text:p>5. Enter first name "John"</text:p>
            <text:p>6. Enter last name "Doe"</text:p>
            <text:p>7. Select role "Staff" from dropdown</text:p>
            <text:p>8. Enter phone number "+1-555-0100"</text:p>
            <text:p>9. Click "Sign Up" button</text:p>
          </table:table-cell>
          <table:table-cell table:style-name="ce10" office:value-type="string" calcext:value-type="string">
            <text:p>User registration succeeds;</text:p>
            <text:p>User is automatically logged in and redirected to dashboard.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2</text:p>
          </table:table-cell>
          <table:table-cell table:style-name="ce10" office:value-type="string" calcext:value-type="string">
            <text:p>User Registration with Duplicate Email</text:p>
          </table:table-cell>
          <table:table-cell table:style-name="ce11" office:value-type="string" calcext:value-type="string">
            <text:p>User Registration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already registered in system with an email address; Sign-up page is accessible</text:p>
          </table:table-cell>
          <table:table-cell table:style-name="ce10" office:value-type="string" calcext:value-type="string">
            <text:p>Username: newuser_002</text:p>
            <text:p>Email: existing@company.com (duplicate)</text:p>
            <text:p>Password: ValidPass123!</text:p>
            <text:p>First Name: Jane</text:p>
            <text:p>Last Name: Smith</text:p>
            <text:p>Role: Manager</text:p>
            <text:p>Phone: +1-555-0101</text:p>
          </table:table-cell>
          <table:table-cell table:style-name="ce10" office:value-type="string" calcext:value-type="string">
            <text:p>1. Navigate to /sign-up page</text:p>
            <text:p>2. Enter username "newuser_002"</text:p>
            <text:p>3. Enter email "existing@company.com" (duplicate)</text:p>
            <text:p>4. Enter password "ValidPass123!"</text:p>
            <text:p>5. Enter first name "Jane"</text:p>
            <text:p>6. Enter last name "Smith"</text:p>
            <text:p>7. Select role "Manager"</text:p>
            <text:p>8. Enter phone "+1-555-0101"</text:p>
            <text:p>9. Click "Sign Up" button</text:p>
          </table:table-cell>
          <table:table-cell table:style-name="ce10" office:value-type="string" calcext:value-type="string">
            <text:p>Form submission is blocked</text:p>
            <text:p>Error message displayed: "Email already registered",</text:p>
            <text:p>User remains on sign-up page and user is not created in database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3</text:p>
          </table:table-cell>
          <table:table-cell table:style-name="ce10" office:value-type="string" calcext:value-type="string">
            <text:p>User Registration with Weak Password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up page is accessible; current API enforces minimum 8 characters on registration; complexity policy (uppercase/lowercase/number/special) must be verified as a security requirement</text:p>
          </table:table-cell>
          <table:table-cell table:style-name="ce10" office:value-type="string" calcext:value-type="string">
            <text:p>Username: newuser_003</text:p>
            <text:p>Email: weakpass@company.com</text:p>
            <text:p>Password: password (weak - no uppercase, number, special char)</text:p>
            <text:p>First Name: Robert</text:p>
            <text:p>Last Name: Johnson</text:p>
            <text:p>Role: Staff</text:p>
            <text:p>Phone: +1-555-0102</text:p>
          </table:table-cell>
          <table:table-cell table:style-name="ce10" office:value-type="string" calcext:value-type="string">
            <text:p>1. Navigate to /sign-up page</text:p>
            <text:p>2. Enter username "newuser_003"</text:p>
            <text:p>3. Enter email "weakpass@company.com"</text:p>
            <text:p>4. Enter password "password" (weak)</text:p>
            <text:p>5. Enter first name "Robert"</text:p>
            <text:p>6. Enter last name "Johnson"</text:p>
            <text:p>7. Select role "Staff"</text:p>
            <text:p>8. Enter phone "+1-555-0102"</text:p>
            <text:p>9. Click "Sign Up" button</text:p>
          </table:table-cell>
          <table:table-cell table:style-name="ce10" office:value-type="string" calcext:value-type="string">
            <text:p>Weak password is rejected with clear complexity error and user remains on sign-up page</text:p>
            <text:p/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4</text:p>
          </table:table-cell>
          <table:table-cell table:style-name="ce10" office:value-type="string" calcext:value-type="string">
            <text:p>User Registration with Missing Required Fields</text:p>
          </table:table-cell>
          <table:table-cell table:style-name="ce11" office:value-type="string" calcext:value-type="string">
            <text:p>User Registration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up page is accessible; Email and password are required fields</text:p>
          </table:table-cell>
          <table:table-cell table:style-name="ce10" office:value-type="string" calcext:value-type="string">
            <text:p>Username: (left empty)</text:p>
            <text:p>Email: incomplete@company.com</text:p>
            <text:p>Password: ValidPass123!</text:p>
            <text:p>First Name: (left empty)</text:p>
            <text:p>Last Name: Brown</text:p>
            <text:p>Role: Staff</text:p>
            <text:p>Phone: (left empty)</text:p>
          </table:table-cell>
          <table:table-cell table:style-name="ce10" office:value-type="string" calcext:value-type="string">
            <text:p>1. Navigate to /sign-up page</text:p>
            <text:p>2. Leave username field empty</text:p>
            <text:p>3. Enter email "incomplete@company.com"</text:p>
            <text:p>4. Enter password "ValidPass123!"</text:p>
            <text:p>5. Leave first name empty</text:p>
            <text:p>6. Enter last name "Brown"</text:p>
            <text:p>7. Select role "Staff"</text:p>
            <text:p>8. Leave phone field empty</text:p>
            <text:p>9. Click "Sign Up" button</text:p>
          </table:table-cell>
          <table:table-cell table:style-name="ce10" office:value-type="string" calcext:value-type="string">
            <text:p>Form submission is blocked</text:p>
            <text:p>Error messages displayed for empty required fields: "Username is required", "First Name is required",</text:p>
            <text:p>Required fields are highlighted and user remains on sign-up page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5</text:p>
          </table:table-cell>
          <table:table-cell table:style-name="ce10" office:value-type="string" calcext:value-type="string">
            <text:p>User Registration with Invalid Email Format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up page is accessible; Email validation is enabled</text:p>
          </table:table-cell>
          <table:table-cell table:style-name="ce10" office:value-type="string" calcext:value-type="string">
            <text:p>Username: newuser_005</text:p>
            <text:p>Email: invalid-email-format (missing @domain)</text:p>
            <text:p>Password: ValidPass123!</text:p>
            <text:p>First Name: Michael</text:p>
            <text:p>Last Name: Wilson</text:p>
            <text:p>Role: Staff</text:p>
            <text:p>Phone: +1-555-0105</text:p>
          </table:table-cell>
          <table:table-cell table:style-name="ce10" office:value-type="string" calcext:value-type="string">
            <text:p>1. Navigate to /sign-up page</text:p>
            <text:p>2. Enter username "newuser_005"</text:p>
            <text:p>3. Enter email "invalid-email-format"</text:p>
            <text:p>4. Enter password "ValidPass123!"</text:p>
            <text:p>5. Enter first name "Michael"</text:p>
            <text:p>6. Enter last name "Wilson"</text:p>
            <text:p>7. Select role "Staff"</text:p>
            <text:p>8. Enter phone "+1-555-0105"</text:p>
            <text:p>9. Click "Sign Up" button</text:p>
          </table:table-cell>
          <table:table-cell table:style-name="ce10" office:value-type="string" calcext:value-type="string">
            <text:p>Form submission is blocked</text:p>
            <text:p>Error message displayed: "Please enter a valid email address"</text:p>
            <text:p>Email field is highlighted in red and User remains on sign-up page</text:p>
            <text:p/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6</text:p>
          </table:table-cell>
          <table:table-cell table:style-name="ce10" office:value-type="string" calcext:value-type="string">
            <text:p>User Registration with Password Containing Only Numbers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up page is accessible; current API enforces minimum 8 characters on registration; complexity policy must be verified</text:p>
          </table:table-cell>
          <table:table-cell table:style-name="ce10" office:value-type="string" calcext:value-type="string">
            <text:p>Username: newuser_006</text:p>
            <text:p>Email: numbers@company.com</text:p>
            <text:p>Password: 12345678 (only numbers, 8 chars)</text:p>
            <text:p>First Name: Sarah</text:p>
            <text:p>Last Name: Davis</text:p>
            <text:p>Role: Staff</text:p>
            <text:p>Phone: +1-555-0106</text:p>
          </table:table-cell>
          <table:table-cell table:style-name="ce10" office:value-type="string" calcext:value-type="string">
            <text:p>1. Navigate to /sign-up page</text:p>
            <text:p>2. Enter username "newuser_006"</text:p>
            <text:p>3. Enter email "numbers@company.com"</text:p>
            <text:p>4. Enter password "12345678"</text:p>
            <text:p>5. Enter first name "Sarah"</text:p>
            <text:p>6. Enter last name "Davis"</text:p>
            <text:p>7. Select role "Staff"</text:p>
            <text:p>8. Enter phone "+1-555-0106"</text:p>
            <text:p>9. Click "Sign Up" button</text:p>
          </table:table-cell>
          <table:table-cell table:style-name="ce10" office:value-type="string" calcext:value-type="string">
            <text:p>Expected by security policy: password containing only numbers is rejected with complexity validation error</text:p>
            <text:p>If account is created successfully, log as defect: "Registration accepts non-complex password"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7</text:p>
          </table:table-cell>
          <table:table-cell table:style-name="ce10" office:value-type="string" calcext:value-type="string">
            <text:p>User Registration with Username Containing Spaces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up page is accessible; Username field accepts alphanumeric characters and underscores only</text:p>
          </table:table-cell>
          <table:table-cell table:style-name="ce10" office:value-type="string" calcext:value-type="string">
            <text:p>Username: new user 007 (contains spaces)</text:p>
            <text:p>Email: spacename@company.com</text:p>
            <text:p>Password: ValidPass123!</text:p>
            <text:p>First Name: Lisa</text:p>
            <text:p>Last Name: Miller</text:p>
            <text:p>Role: Staff</text:p>
            <text:p>Phone: +1-555-0107</text:p>
          </table:table-cell>
          <table:table-cell table:style-name="ce10" office:value-type="string" calcext:value-type="string">
            <text:p>1. Navigate to /sign-up page</text:p>
            <text:p>2. Enter username "new user 007" (with spaces)</text:p>
            <text:p>3. Enter email "spacename@company.com"</text:p>
            <text:p>4. Enter password "ValidPass123!"</text:p>
            <text:p>5. Enter first name "Lisa"</text:p>
            <text:p>6. Enter last name "Miller"</text:p>
            <text:p>7. Select role "Staff"</text:p>
            <text:p>8. Enter phone "+1-555-0107"</text:p>
            <text:p>9. Click "Sign Up" button</text:p>
          </table:table-cell>
          <table:table-cell table:style-name="ce10" office:value-type="string" calcext:value-type="string">
            <text:p>Form submission is blocked</text:p>
            <text:p>Error message displayed: "Username can only contain letters, numbers, and underscores"</text:p>
            <text:p>Username field is highlighted</text:p>
            <text:p>User remains on sign-up page</text:p>
            <text:p>User is not created in databas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8</text:p>
          </table:table-cell>
          <table:table-cell table:style-name="ce10" office:value-type="string" calcext:value-type="string">
            <text:p>User Registration with Very Long Input Values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up page is accessible; Database has field length constraints</text:p>
          </table:table-cell>
          <table:table-cell table:style-name="ce10" office:value-type="string" calcext:value-type="string">
            <text:p>Username: abcdefghijklmnopqrstuvwxyzabcdefghijklmnopqrstuvwxyzabcdefghijklmnopqrstuvwxyz (very long)</text:p>
            <text:p>Email: verylongemailaddress1234567890@verylongdomainname.com</text:p>
            <text:p>Password: ValidPass123!</text:p>
            <text:p>First Name: VeryLongFirstNameThatExceedsNormalLength</text:p>
            <text:p>Last Name: VeryLongLastNameThatExceedsNormalLength</text:p>
            <text:p>Phone: +1-555-0108</text:p>
          </table:table-cell>
          <table:table-cell table:style-name="ce10" office:value-type="string" calcext:value-type="string">
            <text:p>1. Navigate to /sign-up page</text:p>
            <text:p>2. Enter very long username (&gt;150 chars)</text:p>
            <text:p>3. Enter very long email</text:p>
            <text:p>4. Enter password "ValidPass123!"</text:p>
            <text:p>5. Enter very long first name</text:p>
            <text:p>6. Enter very long last name</text:p>
            <text:p>7. Select role "Staff"</text:p>
            <text:p>8. Enter phone "+1-555-0108"</text:p>
            <text:p>9. Click "Sign Up" button</text:p>
          </table:table-cell>
          <table:table-cell table:style-name="ce10" office:value-type="string" calcext:value-type="string">
            <text:p>Form submission is blocked</text:p>
            <text:p>Error message displayed: "Username cannot exceed 150 characters" (or similar for other long fields)</text:p>
            <text:p>User remains on sign-up page</text:p>
            <text:p>User is not created in database OR field values are truncated with warning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09</text:p>
          </table:table-cell>
          <table:table-cell table:style-name="ce10" office:value-type="string" calcext:value-type="string">
            <text:p>User Registration with Special Characters in Name Fields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up page is accessible; System should sanitize HTML/script characters</text:p>
          </table:table-cell>
          <table:table-cell table:style-name="ce10" office:value-type="string" calcext:value-type="string">
            <text:p>Username: newuser_009</text:p>
            <text:p>Email: special@company.com</text:p>
            <text:p>Password: ValidPass123!</text:p>
            <text:p>First Name: John&lt;script&gt;alert('xss')&lt;/script&gt;</text:p>
            <text:p>Last Name: &lt;img src=x onerror=alert('xss')&gt;</text:p>
            <text:p>Phone: +1-555-0109</text:p>
          </table:table-cell>
          <table:table-cell table:style-name="ce10" office:value-type="string" calcext:value-type="string">
            <text:p>1. Navigate to /sign-up page</text:p>
            <text:p>2. Enter username "newuser_009"</text:p>
            <text:p>3. Enter email "special@company.com"</text:p>
            <text:p>4. Enter password "ValidPass123!"</text:p>
            <text:p>5. Enter first name with script tag: "John&lt;script&gt;alert('xss')&lt;/script&gt;"</text:p>
            <text:p>6. Enter last name with img tag: "&lt;img src=x onerror=alert('xss')&gt;"</text:p>
            <text:p>7. Select role "Staff"</text:p>
            <text:p>8. Enter phone "+1-555-0109"</text:p>
            <text:p>9. Click "Sign Up" button</text:p>
          </table:table-cell>
          <table:table-cell table:style-name="ce10" office:value-type="string" calcext:value-type="string">
            <text:p>Form submission is blocked OR fields are sanitized</text:p>
            <text:p>No alert/popup appears (XSS is prevented)</text:p>
            <text:p>Error message: "Name fields contain invalid characters" OR script tags are removed</text:p>
            <text:p>User remains on sign-up page</text:p>
            <text:p>User is not created OR created with sanitized data</text:p>
            <text:p>Database integrity is maintained (no malicious code stored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EG-10</text:p>
          </table:table-cell>
          <table:table-cell table:style-name="ce10" office:value-type="string" calcext:value-type="string">
            <text:p>User Registration Role Selection - Admin Role Attempt</text:p>
          </table:table-cell>
          <table:table-cell table:style-name="ce11" office:value-type="string" calcext:value-type="string">
            <text:p>User Registration </text:p>
          </table:table-cell>
          <table:table-cell table:style-name="ce12" office:value-type="string" calcext:value-type="string">
            <text:p>UC-01 User Registration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up page is accessible; Role dropdown shows Staff, Manager, Admin; New registrations should default to Staff role</text:p>
          </table:table-cell>
          <table:table-cell table:style-name="ce10" office:value-type="string" calcext:value-type="string">
            <text:p>Username: newuser_010</text:p>
            <text:p>Email: adminrole@company.com</text:p>
            <text:p>Password: ValidPass123!</text:p>
            <text:p>First Name: James</text:p>
            <text:p>Last Name: Taylor</text:p>
            <text:p>Role: Admin (selected from dropdown)</text:p>
            <text:p>Phone: +1-555-0110</text:p>
          </table:table-cell>
          <table:table-cell table:style-name="ce10" office:value-type="string" calcext:value-type="string">
            <text:p>1. Navigate to /sign-up page</text:p>
            <text:p>2. Enter all required information</text:p>
            <text:p>3. Click role dropdown</text:p>
            <text:p>4. Select "Admin" option</text:p>
            <text:p>5. Click "Sign Up" button</text:p>
          </table:table-cell>
          <table:table-cell table:style-name="ce10" office:value-type="string" calcext:value-type="string">
            <text:p>User is registered successfully BUT with "Staff" role (default)</text:p>
            <text:p>Admin role request is ignored or overridden by system</text:p>
            <text:p>OR error message: "New users cannot register as Admin"</text:p>
            <text:p>User can login with Staff role</text:p>
            <text:p>User cannot access admin features (/users page access denied)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1</text:p>
          </table:table-cell>
          <table:table-cell table:style-name="ce10" office:value-type="string" calcext:value-type="string">
            <text:p>Successful User Login with Valid Credentials</text:p>
          </table:table-cell>
          <table:table-cell table:style-name="ce11" office:value-type="string" calcext:value-type="string">
            <text:p>User Login</text:p>
          </table:table-cell>
          <table:table-cell table:style-name="ce12" office:value-type="string" calcext:value-type="string">
            <text:p>UC-02 User Logi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ered active user exists in system; Sign-in page is accessible at /sign-in; Cookies are enabled</text:p>
          </table:table-cell>
          <table:table-cell table:style-name="ce10" office:value-type="string" calcext:value-type="string">
            <text:p>Username/Email: staff_user@company.com</text:p>
            <text:p>Password: ValidPass123!</text:p>
          </table:table-cell>
          <table:table-cell table:style-name="ce10" office:value-type="string" calcext:value-type="string">
            <text:p>1. Navigate to /sign-in page</text:p>
            <text:p>2. Enter email "staff_user@company.com"</text:p>
            <text:p>3. Enter password "ValidPass123!"</text:p>
            <text:p>4. Click "Sign In" button</text:p>
          </table:table-cell>
          <table:table-cell table:style-name="ce10" office:value-type="string" calcext:value-type="string">
            <text:p>Login is successful</text:p>
            <text:p>JWT access_token and refresh_token are set in HttpOnly cookies</text:p>
            <text:p>User is redirected to dashboard page (/)</text:p>
            <text:p>User profile displays logged-in user's name</text:p>
            <text:p>Navbar shows username and logout option</text:p>
            <text:p>User can access protected pages (inventory, sales, etc.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2</text:p>
          </table:table-cell>
          <table:table-cell table:style-name="ce10" office:value-type="string" calcext:value-type="string">
            <text:p>User Login with Invalid Credentials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ered user exists in system; Sign-in page is accessible</text:p>
          </table:table-cell>
          <table:table-cell table:style-name="ce10" office:value-type="string" calcext:value-type="string">
            <text:p>Username/Email: staff_user@company.com</text:p>
            <text:p>Password: WrongPassword123! (incorrect)</text:p>
          </table:table-cell>
          <table:table-cell table:style-name="ce10" office:value-type="string" calcext:value-type="string">
            <text:p>1. Navigate to /sign-in page</text:p>
            <text:p>2. Enter email "staff_user@company.com"</text:p>
            <text:p>3. Enter password "WrongPassword123!"</text:p>
            <text:p>4. Click "Sign In" button</text:p>
          </table:table-cell>
          <table:table-cell table:style-name="ce10" office:value-type="string" calcext:value-type="string">
            <text:p>Login fails</text:p>
            <text:p>Error message displayed: "Invalid email or password"</text:p>
            <text:p>User remains on sign-in page</text:p>
            <text:p>No JWT tokens are set</text:p>
            <text:p>User cannot access protected pages</text:p>
            <text:p>Form data (except password) is preserve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3</text:p>
          </table:table-cell>
          <table:table-cell table:style-name="ce10" office:value-type="string" calcext:value-type="string">
            <text:p>User Login with Non-Existent Email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in page is accessible; Email "nonexistent@company.com" is not registered</text:p>
          </table:table-cell>
          <table:table-cell table:style-name="ce10" office:value-type="string" calcext:value-type="string">
            <text:p>Username/Email: nonexistent@company.com</text:p>
            <text:p>Password: ValidPass123!</text:p>
          </table:table-cell>
          <table:table-cell table:style-name="ce10" office:value-type="string" calcext:value-type="string">
            <text:p>1. Navigate to /sign-in page</text:p>
            <text:p>2. Enter email "nonexistent@company.com"</text:p>
            <text:p>3. Enter password "ValidPass123!"</text:p>
            <text:p>4. Click "Sign In" button</text:p>
          </table:table-cell>
          <table:table-cell table:style-name="ce10" office:value-type="string" calcext:value-type="string">
            <text:p>Login fails</text:p>
            <text:p>Error message displayed: "Invalid email or password"</text:p>
            <text:p>User remains on sign-in page</text:p>
            <text:p>No JWT tokens are set</text:p>
            <text:p>User cannot access protected page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4</text:p>
          </table:table-cell>
          <table:table-cell table:style-name="ce10" office:value-type="string" calcext:value-type="string">
            <text:p>User Login with Empty Fields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in page is accessible</text:p>
          </table:table-cell>
          <table:table-cell table:style-name="ce10" office:value-type="string" calcext:value-type="string">
            <text:p>Username/Email: (empty)</text:p>
            <text:p>Password: (empty)</text:p>
          </table:table-cell>
          <table:table-cell table:style-name="ce10" office:value-type="string" calcext:value-type="string">
            <text:p>1. Navigate to /sign-in page</text:p>
            <text:p>2. Leave email field empty</text:p>
            <text:p>3. Leave password field empty</text:p>
            <text:p>4. Click "Sign In" button</text:p>
          </table:table-cell>
          <table:table-cell table:style-name="ce10" office:value-type="string" calcext:value-type="string">
            <text:p>Form submission is blocked</text:p>
            <text:p>Error messages displayed: "Email is required", "Password is required"</text:p>
            <text:p>Fields are highlighted in red</text:p>
            <text:p>User remains on sign-in page</text:p>
            <text:p>No API call is made to backen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5</text:p>
          </table:table-cell>
          <table:table-cell table:style-name="ce10" office:value-type="string" calcext:value-type="string">
            <text:p>User Login with SQL Injection Attempt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ign-in page is accessible; Backend uses parameterized queries</text:p>
          </table:table-cell>
          <table:table-cell table:style-name="ce10" office:value-type="string" calcext:value-type="string">
            <text:p>Username/Email: admin' OR '1'='1</text:p>
            <text:p>Password: ' OR '1'='1' --</text:p>
          </table:table-cell>
          <table:table-cell table:style-name="ce10" office:value-type="string" calcext:value-type="string">
            <text:p>1. Navigate to /sign-in page</text:p>
            <text:p>2. Enter email: "admin' OR '1'='1"</text:p>
            <text:p>3. Enter password: "' OR '1'='1' --"</text:p>
            <text:p>4. Click "Sign In" button</text:p>
          </table:table-cell>
          <table:table-cell table:style-name="ce10" office:value-type="string" calcext:value-type="string">
            <text:p>Login fails (SQL injection is prevented)</text:p>
            <text:p>Error message displayed: "Invalid email or password"</text:p>
            <text:p>User remains on sign-in page</text:p>
            <text:p>No database error is exposed to user</text:p>
            <text:p>Backend logs security attempt</text:p>
            <text:p>User cannot access protected page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6</text:p>
          </table:table-cell>
          <table:table-cell table:style-name="ce10" office:value-type="string" calcext:value-type="string">
            <text:p>User Login with Inactive Account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account exists but is marked as inactive/disabled in system; Sign-in page is accessible</text:p>
          </table:table-cell>
          <table:table-cell table:style-name="ce10" office:value-type="string" calcext:value-type="string">
            <text:p>Username/Email: inactive_user@company.com</text:p>
            <text:p>Password: ValidPass123! (correct password)</text:p>
          </table:table-cell>
          <table:table-cell table:style-name="ce10" office:value-type="string" calcext:value-type="string">
            <text:p>1. Navigate to /sign-in page</text:p>
            <text:p>2. Enter email "inactive_user@company.com"</text:p>
            <text:p>3. Enter password "ValidPass123!"</text:p>
            <text:p>4. Click "Sign In" button</text:p>
          </table:table-cell>
          <table:table-cell table:style-name="ce10" office:value-type="string" calcext:value-type="string">
            <text:p>Login fails</text:p>
            <text:p>Error message displayed: "Account is inactive" OR "Your account has been disabled"</text:p>
            <text:p>User remains on sign-in page</text:p>
            <text:p>No JWT tokens are set</text:p>
            <text:p>User cannot access protected pages</text:p>
            <text:p>Support contact information may be displaye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IN-17</text:p>
          </table:table-cell>
          <table:table-cell table:style-name="ce10" office:value-type="string" calcext:value-type="string">
            <text:p>User Login - Form Persistence After Failed Attempt</text:p>
          </table:table-cell>
          <table:table-cell table:style-name="ce11" office:value-type="string" calcext:value-type="string">
            <text:p>User Login </text:p>
          </table:table-cell>
          <table:table-cell table:style-name="ce12" office:value-type="string" calcext:value-type="string">
            <text:p>UC-02 User Login</text:p>
          </table:table-cell>
          <table:table-cell table:style-name="ce13" office:value-type="string" calcext:value-type="string">
            <text:p>Positive (UX validation)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in page is accessible; User has entered data and attempt failed</text:p>
          </table:table-cell>
          <table:table-cell table:style-name="ce10" office:value-type="string" calcext:value-type="string">
            <text:p>Username/Email: staff_user@company.com</text:p>
            <text:p>Password: WrongPass123!</text:p>
          </table:table-cell>
          <table:table-cell table:style-name="ce10" office:value-type="string" calcext:value-type="string">
            <text:p>1. Navigate to /sign-in page</text:p>
            <text:p>2. Enter email "staff_user@company.com"</text:p>
            <text:p>3. Enter password "WrongPass123!"</text:p>
            <text:p>4. Click "Sign In" button</text:p>
            <text:p>5. Observe form fields after error</text:p>
          </table:table-cell>
          <table:table-cell table:style-name="ce10" office:value-type="string" calcext:value-type="string">
            <text:p>Login fails with error message</text:p>
            <text:p>Email field retains entered value "staff_user@company.com"</text:p>
            <text:p>Password field is cleared (for security)</text:p>
            <text:p>User can easily correct password and retry</text:p>
            <text:p>Error message is clearly visibl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OUT-18</text:p>
          </table:table-cell>
          <table:table-cell table:style-name="ce10" office:value-type="string" calcext:value-type="string">
            <text:p>Successful User Logout</text:p>
          </table:table-cell>
          <table:table-cell table:style-name="ce11" office:value-type="string" calcext:value-type="string">
            <text:p>User Logout</text:p>
          </table:table-cell>
          <table:table-cell table:style-name="ce12" office:value-type="string" calcext:value-type="string">
            <text:p>UC-03 User Logou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User is on dashboard or any protected page; Logout button is visible in navbar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User logs in with valid credentials</text:p>
            <text:p>2. Navigate to dashboard</text:p>
            <text:p>3. Locate logout button in navbar</text:p>
            <text:p>4. Click logout button</text:p>
          </table:table-cell>
          <table:table-cell table:style-name="ce10" office:value-type="string" calcext:value-type="string">
            <text:p>Logout is successful</text:p>
            <text:p>JWT tokens (access_token, refresh_token) are deleted from cookies</text:p>
            <text:p>User is redirected to sign-in page</text:p>
            <text:p>Navbar no longer displays username</text:p>
            <text:p>User cannot access protected pages (redirected to /sign-in)</text:p>
            <text:p>New login is required to access system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LOGOUT-19</text:p>
          </table:table-cell>
          <table:table-cell table:style-name="ce10" office:value-type="string" calcext:value-type="string">
            <text:p>Logout - Token Blacklist Verification</text:p>
          </table:table-cell>
          <table:table-cell table:style-name="ce11" office:value-type="string" calcext:value-type="string">
            <text:p>User Logout </text:p>
          </table:table-cell>
          <table:table-cell table:style-name="ce12" office:value-type="string" calcext:value-type="string">
            <text:p>UC-03 User Logout</text:p>
          </table:table-cell>
          <table:table-cell table:style-name="ce13" office:value-type="string" calcext:value-type="string">
            <text:p>Positive (Security validation)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System maintains token blacklist or invalidates tokens on logout</text:p>
          </table:table-cell>
          <table:table-cell table:style-name="ce10" office:value-type="string" calcext:value-type="string">
            <text:p>Access token obtained after login</text:p>
          </table:table-cell>
          <table:table-cell table:style-name="ce10" office:value-type="string" calcext:value-type="string">
            <text:p>1. User logs in and obtains access token</text:p>
            <text:p>2. Note the access token value</text:p>
            <text:p>3. Perform logout</text:p>
            <text:p>4. Attempt to use the old access token to access protected endpoint (e.g., GET /api/check-auth/)</text:p>
            <text:p>5. Attempt with curl: `curl -H "Cookie: access_token=OLD_TOKEN" http://localhost:8000/api/check-auth/`</text:p>
          </table:table-cell>
          <table:table-cell table:style-name="ce10" office:value-type="string" calcext:value-type="string">
            <text:p>Logout succeeds and tokens are invalidated</text:p>
            <text:p>Using old access token returns 401 Unauthorized</text:p>
            <text:p>User is redirected to sign-in</text:p>
            <text:p>No user data is returned with old token</text:p>
            <text:p>System confirms token is blacklisted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0</text:p>
          </table:table-cell>
          <table:table-cell table:style-name="ce10" office:value-type="string" calcext:value-type="string">
            <text:p>Successful Forgot Password and Reset Flow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not logged in; User account exists with registered email; Sign-in page is accessible; Email system is configured</text:p>
          </table:table-cell>
          <table:table-cell table:style-name="ce10" office:value-type="string" calcext:value-type="string">
            <text:p>Email: staff_user@company.com</text:p>
            <text:p>OTP: (will be sent via email, e.g., 123456)</text:p>
            <text:p>New Password: NewValidPass123!</text:p>
          </table:table-cell>
          <table:table-cell table:style-name="ce10" office:value-type="string" calcext:value-type="string">
            <text:p>1. Navigate to /sign-in page</text:p>
            <text:p>2. Click "Forgot Password?" link</text:p>
            <text:p>3. Enter email "staff_user@company.com"</text:p>
            <text:p>4. Click "Send OTP" button</text:p>
            <text:p>5. Check email for OTP (assume OTP: 123456)</text:p>
            <text:p>6. Enter OTP "123456" in OTP field</text:p>
            <text:p>7. Enter new password "NewValidPass123!"</text:p>
            <text:p>8. Enter confirm password "NewValidPass123!"</text:p>
            <text:p>9. Click "Reset Password" button</text:p>
          </table:table-cell>
          <table:table-cell table:style-name="ce10" office:value-type="string" calcext:value-type="string">
            <text:p>Password reset is successful</text:p>
            <text:p>Success message displayed: "Password reset successful"</text:p>
            <text:p>User is redirected to sign-in page</text:p>
            <text:p>User can login with new password "NewValidPass123!"</text:p>
            <text:p>Old password no longer works</text:p>
            <text:p>OTP is invalidated after use</text:p>
            <text:p>User can access protected pages with new credentials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1</text:p>
          </table:table-cell>
          <table:table-cell table:style-name="ce10" office:value-type="string" calcext:value-type="string">
            <text:p>Forgot Password with Non-Existent Email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Sign-in page and Forgot Password page are accessible; Email "nonexistent@company.com" is not registered</text:p>
          </table:table-cell>
          <table:table-cell table:style-name="ce10" office:value-type="string" calcext:value-type="string">
            <text:p>Email: nonexistent@company.com</text:p>
          </table:table-cell>
          <table:table-cell table:style-name="ce10" office:value-type="string" calcext:value-type="string">
            <text:p>1. Navigate to /sign-in page</text:p>
            <text:p>2. Click "Forgot Password?" link</text:p>
            <text:p>3. Enter email "nonexistent@company.com"</text:p>
            <text:p>4. Click "Send OTP" button</text:p>
          </table:table-cell>
          <table:table-cell table:style-name="ce10" office:value-type="string" calcext:value-type="string">
            <text:p>No OTP is sent</text:p>
            <text:p>Generic message displayed (for security): "If this email is registered, an OTP will be sent"</text:p>
            <text:p>User remains on forgot password page</text:p>
            <text:p>No database modification occurs</text:p>
            <text:p>User is not informed whether email exists or not (prevent user enumeration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2</text:p>
          </table:table-cell>
          <table:table-cell table:style-name="ce10" office:value-type="string" calcext:value-type="string">
            <text:p>Forgot Password with Invalid OTP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has requested password reset; OTP has been sent to registered email; OTP entry page is displayed</text:p>
          </table:table-cell>
          <table:table-cell table:style-name="ce10" office:value-type="string" calcext:value-type="string">
            <text:p>Email: staff_user@company.com</text:p>
            <text:p>Sent OTP: 123456</text:p>
            <text:p>Entered OTP: 000000 (incorrect)</text:p>
            <text:p>New Password: NewValidPass123!</text:p>
          </table:table-cell>
          <table:table-cell table:style-name="ce10" office:value-type="string" calcext:value-type="string">
            <text:p>1. Initiate forgot password for "staff_user@company.com"</text:p>
            <text:p>2. Receive OTP via email (123456)</text:p>
            <text:p>3. Navigate to OTP entry page</text:p>
            <text:p>4. Enter incorrect OTP "000000"</text:p>
            <text:p>5. Enter new password "NewValidPass123!"</text:p>
            <text:p>6. Click "Reset Password" button</text:p>
          </table:table-cell>
          <table:table-cell table:style-name="ce10" office:value-type="string" calcext:value-type="string">
            <text:p>Password reset fails</text:p>
            <text:p>Error message displayed: "Invalid OTP" OR "OTP is incorrect"</text:p>
            <text:p>Password is NOT updated in database</text:p>
            <text:p>User remains on password reset page</text:p>
            <text:p>User can retry with correct OTP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3</text:p>
          </table:table-cell>
          <table:table-cell table:style-name="ce10" office:value-type="string" calcext:value-type="string">
            <text:p>Forgot Password with Expired OTP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has requested password reset; OTP was sent more than 15 minutes ago (OTP expiry time); OTP entry page is displayed</text:p>
          </table:table-cell>
          <table:table-cell table:style-name="ce10" office:value-type="string" calcext:value-type="string">
            <text:p>Email: staff_user@company.com</text:p>
            <text:p>OTP sent at: 2:00 PM</text:p>
            <text:p>Current time: 2:16 PM (OTP expired)</text:p>
            <text:p>OTP value: 123456</text:p>
            <text:p>New Password: NewValidPass123!</text:p>
          </table:table-cell>
          <table:table-cell table:style-name="ce10" office:value-type="string" calcext:value-type="string">
            <text:p>1. Initiate forgot password for "staff_user@company.com"</text:p>
            <text:p>2. Wait for more than 15 minutes (or simulate time passage)</text:p>
            <text:p>3. Enter the OTP that was sent</text:p>
            <text:p>4. Enter new password "NewValidPass123!"</text:p>
            <text:p>5. Click "Reset Password" button</text:p>
          </table:table-cell>
          <table:table-cell table:style-name="ce10" office:value-type="string" calcext:value-type="string">
            <text:p>Password reset fails</text:p>
            <text:p>Error message displayed: "OTP has expired" OR "Your OTP is no longer valid"</text:p>
            <text:p>User is prompted to request a new OTP</text:p>
            <text:p>Password is NOT updated in database</text:p>
            <text:p>User can click "Resend OTP" to get a new cod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4</text:p>
          </table:table-cell>
          <table:table-cell table:style-name="ce10" office:value-type="string" calcext:value-type="string">
            <text:p>Forgot Password with Weak New Password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has requested password reset; valid OTP has been sent and received; reset API enforces min length (8+) plus complexity checks</text:p>
          </table:table-cell>
          <table:table-cell table:style-name="ce10" office:value-type="string" calcext:value-type="string">
            <text:p>Email: staff_user@company.com</text:p>
            <text:p>OTP: 123456 (valid)</text:p>
            <text:p>New Password: password (weak - missing uppercase, number, special char)</text:p>
          </table:table-cell>
          <table:table-cell table:style-name="ce10" office:value-type="string" calcext:value-type="string">
            <text:p>1. Initiate forgot password for "staff_user@company.com"</text:p>
            <text:p>2. Enter valid OTP "123456"</text:p>
            <text:p>3. Enter weak password "password"</text:p>
            <text:p>4. Enter confirm password "password"</text:p>
            <text:p>5. Click "Reset Password" button</text:p>
          </table:table-cell>
          <table:table-cell table:style-name="ce10" office:value-type="string" calcext:value-type="string">
            <text:p>Password reset is blocked</text:p>
            <text:p>Validation error is returned for weak password (missing uppercase/number/special and/or minimum length)</text:p>
            <text:p>Password is NOT updated in database</text:p>
            <text:p>User remains on password reset page</text:p>
            <text:p>OTP remains usable until success or expiry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5</text:p>
          </table:table-cell>
          <table:table-cell table:style-name="ce10" office:value-type="string" calcext:value-type="string">
            <text:p>Forgot Password - OTP Resend with Cooldown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has just requested OTP; System enforces 60-second resend cooldown to prevent OTP flooding</text:p>
          </table:table-cell>
          <table:table-cell table:style-name="ce10" office:value-type="string" calcext:value-type="string">
            <text:p>Email: staff_user@company.com</text:p>
          </table:table-cell>
          <table:table-cell table:style-name="ce10" office:value-type="string" calcext:value-type="string">
            <text:p>1. Navigate to Forgot Password page</text:p>
            <text:p>2. Enter email "staff_user@company.com"</text:p>
            <text:p>3. Click "Send OTP" button</text:p>
            <text:p>4. Immediately click "Resend OTP" button (within 60 seconds)</text:p>
            <text:p>5. Observe the button state</text:p>
          </table:table-cell>
          <table:table-cell table:style-name="ce10" office:value-type="string" calcext:value-type="string">
            <text:p>First OTP is sent</text:p>
            <text:p>Resend button is disabled or shows countdown timer: "Resend in 58 seconds"</text:p>
            <text:p>Clicking disabled button has no effect</text:p>
            <text:p>After 60 seconds, countdown disappears and "Resend OTP" button becomes clickable</text:p>
            <text:p>Clicking resend after cooldown sends new OTP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WD-26</text:p>
          </table:table-cell>
          <table:table-cell table:style-name="ce10" office:value-type="string" calcext:value-type="string">
            <text:p>Forgot Password - Multiple OTP Requests</text:p>
          </table:table-cell>
          <table:table-cell table:style-name="ce11" office:value-type="string" calcext:value-type="string">
            <text:p>Forgot Password </text:p>
          </table:table-cell>
          <table:table-cell table:style-name="ce12" office:value-type="string" calcext:value-type="string">
            <text:p>UC-04 Forgot Password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can request multiple OTPs; System invalidates previous OTP when new one is sent</text:p>
          </table:table-cell>
          <table:table-cell table:style-name="ce10" office:value-type="string" calcext:value-type="string">
            <text:p>Email: staff_user@company.com</text:p>
            <text:p>First OTP: 123456</text:p>
            <text:p>Second OTP: 654321</text:p>
          </table:table-cell>
          <table:table-cell table:style-name="ce10" office:value-type="string" calcext:value-type="string">
            <text:p>1. Initiate forgot password for "staff_user@company.com"</text:p>
            <text:p>2. Receive first OTP: "123456"</text:p>
            <text:p>3. Wait and request new OTP (click Resend)</text:p>
            <text:p>4. Receive second OTP: "654321"</text:p>
            <text:p>5. Try to use first OTP "123456" to reset password</text:p>
            <text:p>6. Enter password and attempt reset</text:p>
          </table:table-cell>
          <table:table-cell table:style-name="ce10" office:value-type="string" calcext:value-type="string">
            <text:p>First OTP becomes invalid when second OTP is generated</text:p>
            <text:p>Attempting to use first OTP returns error: "Invalid OTP"</text:p>
            <text:p>Using second OTP succeeds in password reset</text:p>
            <text:p>Only one OTP is valid at a time</text:p>
            <text:p>Database maintains single active OTP per user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ESSION-27</text:p>
          </table:table-cell>
          <table:table-cell table:style-name="ce10" office:value-type="string" calcext:value-type="string">
            <text:p>Session Persistence - Token Refresh</text:p>
          </table:table-cell>
          <table:table-cell table:style-name="ce11" office:value-type="string" calcext:value-type="string">
            <text:p>Session </text:p>
          </table:table-cell>
          <table:table-cell table:style-name="ce12" office:value-type="string" calcext:value-type="string">
            <text:p>UC-05 Session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Access token is approaching expiry (or has expired); Refresh token is still valid</text:p>
          </table:table-cell>
          <table:table-cell table:style-name="ce10" office:value-type="string" calcext:value-type="string">
            <text:p>Access token expiry: 1 hour</text:p>
            <text:p>Refresh token expiry: 7 days</text:p>
          </table:table-cell>
          <table:table-cell table:style-name="ce10" office:value-type="string" calcext:value-type="string">
            <text:p>1. User logs in successfully</text:p>
            <text:p>2. Access token is obtained and set in cookie</text:p>
            <text:p>3. Wait for access token to expire OR simulate expiry</text:p>
            <text:p>4. Attempt to access protected resource (e.g., GET /api/inventory/)</text:p>
            <text:p>5. System attempts to refresh token using refresh_token</text:p>
            <text:p>6. New access token is generated</text:p>
            <text:p>7. Request is retried with new access token</text:p>
          </table:table-cell>
          <table:table-cell table:style-name="ce10" office:value-type="string" calcext:value-type="string">
            <text:p>User session continues without interruption</text:p>
            <text:p>New access token is issued</text:p>
            <text:p>Refresh token is still valid</text:p>
            <text:p>Protected resources are accessible with new token</text:p>
            <text:p>No manual login is required</text:p>
            <text:p>User experience remains seamles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ESSION-28</text:p>
          </table:table-cell>
          <table:table-cell table:style-name="ce10" office:value-type="string" calcext:value-type="string">
            <text:p>Session Timeout - Access Token Expiry</text:p>
          </table:table-cell>
          <table:table-cell table:style-name="ce11" office:value-type="string" calcext:value-type="string">
            <text:p>Session </text:p>
          </table:table-cell>
          <table:table-cell table:style-name="ce12" office:value-type="string" calcext:value-type="string">
            <text:p>UC-05 Session Management</text:p>
          </table:table-cell>
          <table:table-cell table:style-name="ce13" office:value-type="string" calcext:value-type="string">
            <text:p>Edg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Access token has expired; Refresh token is still valid; System handles expired tokens</text:p>
          </table:table-cell>
          <table:table-cell table:style-name="ce10" office:value-type="string" calcext:value-type="string">
            <text:p>Access token: expired</text:p>
            <text:p>Refresh token: valid</text:p>
          </table:table-cell>
          <table:table-cell table:style-name="ce10" office:value-type="string" calcext:value-type="string">
            <text:p>1. User logs in successfully</text:p>
            <text:p>2. Access token is obtained</text:p>
            <text:p>3. Wait for 1 hour to let access token expire</text:p>
            <text:p>4. Attempt to access protected page (e.g., /inventory)</text:p>
            <text:p>5. System detects expired access token</text:p>
            <text:p>6. System uses refresh token to request new access token</text:p>
          </table:table-cell>
          <table:table-cell table:style-name="ce10" office:value-type="string" calcext:value-type="string">
            <text:p>Expired access token is rejected (401 Unauthorized)</text:p>
            <text:p>System automatically attempts refresh</text:p>
            <text:p>If refresh succeeds, new access token is issued</text:p>
            <text:p>User can access protected page without re-login</text:p>
            <text:p>Navbar continues to show logged-in state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ESSION-29</text:p>
          </table:table-cell>
          <table:table-cell table:style-name="ce10" office:value-type="string" calcext:value-type="string">
            <text:p>Session Timeout - Refresh Token Expiry</text:p>
          </table:table-cell>
          <table:table-cell table:style-name="ce11" office:value-type="string" calcext:value-type="string">
            <text:p>Session </text:p>
          </table:table-cell>
          <table:table-cell table:style-name="ce12" office:value-type="string" calcext:value-type="string">
            <text:p>UC-05 Session Management</text:p>
          </table:table-cell>
          <table:table-cell table:style-name="ce13" office:value-type="string" calcext:value-type="string">
            <text:p>Edg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Both access and refresh tokens have expired (more than 7 days); System enforces re-authentication</text:p>
          </table:table-cell>
          <table:table-cell table:style-name="ce10" office:value-type="string" calcext:value-type="string">
            <text:p>Access token: expired</text:p>
            <text:p>Refresh token: expired</text:p>
          </table:table-cell>
          <table:table-cell table:style-name="ce10" office:value-type="string" calcext:value-type="string">
            <text:p>1. User logs in successfully</text:p>
            <text:p>2. Tokens are obtained</text:p>
            <text:p>3. Wait for 7+ days (or simulate time passage)</text:p>
            <text:p>4. Attempt to access protected page (e.g., /sales)</text:p>
            <text:p>5. System detects expired access token</text:p>
            <text:p>6. System attempts to refresh using expired refresh token</text:p>
          </table:table-cell>
          <table:table-cell table:style-name="ce10" office:value-type="string" calcext:value-type="string">
            <text:p>Both tokens are rejected as invalid/expired</text:p>
            <text:p>Refresh attempt fails (401 Unauthorized)</text:p>
            <text:p>User is automatically logged out</text:p>
            <text:p>User is redirected to /sign-in page</text:p>
            <text:p>Session is fully terminated</text:p>
            <text:p>User must login again to continu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ESSION-30</text:p>
          </table:table-cell>
          <table:table-cell table:style-name="ce10" office:value-type="string" calcext:value-type="string">
            <text:p>Concurrent Session Handling</text:p>
          </table:table-cell>
          <table:table-cell table:style-name="ce11" office:value-type="string" calcext:value-type="string">
            <text:p>Session </text:p>
          </table:table-cell>
          <table:table-cell table:style-name="ce12" office:value-type="string" calcext:value-type="string">
            <text:p>UC-05 Session Management</text:p>
          </table:table-cell>
          <table:table-cell table:style-name="ce13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logs in from multiple devices/browsers simultaneously; System allows concurrent sessions OR limits to single session</text:p>
          </table:table-cell>
          <table:table-cell table:style-name="ce10" office:value-type="string" calcext:value-type="string">
            <text:p>User: staff_user@company.com</text:p>
            <text:p>Device 1: Chrome Browser on Desktop</text:p>
            <text:p>Device 2: Safari Browser on Mobile</text:p>
          </table:table-cell>
          <table:table-cell table:style-name="ce10" office:value-type="string" calcext:value-type="string">
            <text:p>1. Open browser #1 (Chrome Desktop)</text:p>
            <text:p>2. Login with staff_user@company.com</text:p>
            <text:p>3. Verify login successful, tokens set</text:p>
            <text:p>4. Open browser #2 (Safari Mobile)</text:p>
            <text:p>5. Login with same staff_user@company.com</text:p>
            <text:p>6. Verify login successful in browser #2</text:p>
            <text:p>7. Check if browser #1 session is still active</text:p>
          </table:table-cell>
          <table:table-cell table:style-name="ce10" office:value-type="string" calcext:value-type="string">
            <text:p>(System design dependent - document actual behavior)</text:p>
            <text:p>Option A - Multiple sessions allowed: Both sessions remain active independently</text:p>
            <text:p>Option B - Single session enforced: Browser #1 session is terminated; user forced to re-login if they return to browser #1</text:p>
            <text:p>Both browsers have separate cookies and tokens</text:p>
            <text:p>Database shows session count/last-login timestamp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BAC-31</text:p>
          </table:table-cell>
          <table:table-cell table:style-name="ce10" office:value-type="string" calcext:value-type="string">
            <text:p>Admin User Access to Admin Features</text:p>
          </table:table-cell>
          <table:table-cell table:style-name="ce11" office:value-type="string" calcext:value-type="string">
            <text:p>Role-Based Access Control </text:p>
          </table:table-cell>
          <table:table-cell table:style-name="ce12" office:value-type="string" calcext:value-type="string">
            <text:p>UC-06 Role-Based Access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with Admin role is logged in; /users page is admin-only; Admin users can manage all system users</text:p>
          </table:table-cell>
          <table:table-cell table:style-name="ce10" office:value-type="string" calcext:value-type="string">
            <text:p>Username: admin_user@company.com</text:p>
            <text:p>Role: Admin</text:p>
            <text:p>Password: AdminPass123!</text:p>
          </table:table-cell>
          <table:table-cell table:style-name="ce10" office:value-type="string" calcext:value-type="string">
            <text:p>1. Login with admin_user@company.com (Admin role)</text:p>
            <text:p>2. Navigate to dashboard</text:p>
            <text:p>3. Click on "Users" in sidebar navigation</text:p>
            <text:p>4. Verify page loads successfully</text:p>
            <text:p>5. Attempt to create new user</text:p>
            <text:p>6. Attempt to edit existing user</text:p>
            <text:p>7. Attempt to delete a user</text:p>
          </table:table-cell>
          <table:table-cell table:style-name="ce10" office:value-type="string" calcext:value-type="string">
            <text:p>Admin user can access /users page</text:p>
            <text:p>Admin user can view all users in the system</text:p>
            <text:p>Admin user can create new users</text:p>
            <text:p>Admin user can edit user information</text:p>
            <text:p>Admin user can delete users</text:p>
            <text:p>All CRUD operations succeed</text:p>
            <text:p>Sidebar shows "Users" option for admin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BAC-32</text:p>
          </table:table-cell>
          <table:table-cell table:style-name="ce10" office:value-type="string" calcext:value-type="string">
            <text:p>Manager User Blocked from Admin Features</text:p>
          </table:table-cell>
          <table:table-cell table:style-name="ce11" office:value-type="string" calcext:value-type="string">
            <text:p>Role-Based Access Control </text:p>
          </table:table-cell>
          <table:table-cell table:style-name="ce12" office:value-type="string" calcext:value-type="string">
            <text:p>UC-06 Role-Based Access</text:p>
          </table:table-cell>
          <table:table-cell table:style-name="ce13" office:value-type="string" calcext:value-type="string">
            <text:p>Positive (Security validation)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with Manager role is logged in; /users page should not be accessible to Manager</text:p>
          </table:table-cell>
          <table:table-cell table:style-name="ce10" office:value-type="string" calcext:value-type="string">
            <text:p>Username: manager_user@company.com</text:p>
            <text:p>Role: Manager</text:p>
            <text:p>Password: ManagerPass123!</text:p>
          </table:table-cell>
          <table:table-cell table:style-name="ce10" office:value-type="string" calcext:value-type="string">
            <text:p>1. Login with manager_user@company.com (Manager role)</text:p>
            <text:p>2. Navigate to dashboard</text:p>
            <text:p>3. Observe sidebar navigation</text:p>
            <text:p>4. Verify "Users" option is NOT visible in sidebar</text:p>
            <text:p>5. Attempt to directly navigate to /users via URL bar</text:p>
            <text:p>6. Observe system behavior</text:p>
          </table:table-cell>
          <table:table-cell table:style-name="ce10" office:value-type="string" calcext:value-type="string">
            <text:p>Manager user cannot see "Users" option in sidebar</text:p>
            <text:p>Sidebar shows: Products, Sales, Customers, Inventory options only</text:p>
            <text:p>Attempting to navigate to /users directly returns 403 Forbidden OR redirects to dashboard</text:p>
            <text:p>Error message: "Access Denied" OR "You do not have permission"</text:p>
            <text:p>User remains on dashboard</text:p>
            <text:p>No data from /users page is displaye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BAC-33</text:p>
          </table:table-cell>
          <table:table-cell table:style-name="ce10" office:value-type="string" calcext:value-type="string">
            <text:p>Staff User Blocked from Admin Features</text:p>
          </table:table-cell>
          <table:table-cell table:style-name="ce11" office:value-type="string" calcext:value-type="string">
            <text:p>Role-Based Access Control </text:p>
          </table:table-cell>
          <table:table-cell table:style-name="ce12" office:value-type="string" calcext:value-type="string">
            <text:p>UC-06 Role-Based Access</text:p>
          </table:table-cell>
          <table:table-cell table:style-name="ce13" office:value-type="string" calcext:value-type="string">
            <text:p>Positive (Security validation)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with Staff role is logged in; /users page is admin-only; Frontend and backend prevent staff access</text:p>
          </table:table-cell>
          <table:table-cell table:style-name="ce10" office:value-type="string" calcext:value-type="string">
            <text:p>Username: staff_user@company.com</text:p>
            <text:p>Role: Staff</text:p>
            <text:p>Password: StaffPass123!</text:p>
          </table:table-cell>
          <table:table-cell table:style-name="ce10" office:value-type="string" calcext:value-type="string">
            <text:p>1. Login with staff_user@company.com (Staff role)</text:p>
            <text:p>2. Navigate to dashboard</text:p>
            <text:p>3. Observe sidebar navigation</text:p>
            <text:p>4. Verify "Users" option is NOT visible in sidebar</text:p>
            <text:p>5. Attempt to navigate directly to /users via URL</text:p>
            <text:p>6. Observe access denial</text:p>
          </table:table-cell>
          <table:table-cell table:style-name="ce10" office:value-type="string" calcext:value-type="string">
            <text:p>Staff user cannot see "Users" in sidebar</text:p>
            <text:p>Sidebar shows: Products, Sales, Customers, Inventory (limited to staff features)</text:p>
            <text:p>Direct navigation to /users returns 403 Forbidden OR redirects to dashboard</text:p>
            <text:p>No user management interface is visible</text:p>
            <text:p>User remains logged in but access is denied to admin pag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BAC-34</text:p>
          </table:table-cell>
          <table:table-cell table:style-name="ce10" office:value-type="string" calcext:value-type="string">
            <text:p>User Permissions Verification - Delete Product Attempt</text:p>
          </table:table-cell>
          <table:table-cell table:style-name="ce11" office:value-type="string" calcext:value-type="string">
            <text:p>Role-Based Access Control </text:p>
          </table:table-cell>
          <table:table-cell table:style-name="ce12" office:value-type="string" calcext:value-type="string">
            <text:p>UC-06 Role-Based Access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taff user is logged in; Only Admin can delete products; Products exist in system</text:p>
          </table:table-cell>
          <table:table-cell table:style-name="ce10" office:value-type="string" calcext:value-type="string">
            <text:p>Username: staff_user@company.com</text:p>
            <text:p>Role: Staff</text:p>
            <text:p>Password: StaffPass123!</text:p>
            <text:p>Product ID: 1</text:p>
            <text:p>Product Name: Laptop</text:p>
          </table:table-cell>
          <table:table-cell table:style-name="ce10" office:value-type="string" calcext:value-type="string">
            <text:p>1. Login with staff_user@company.com (Staff role)</text:p>
            <text:p>2. Navigate to /products page</text:p>
            <text:p>3. View product list</text:p>
            <text:p>4. Click on a product to view details</text:p>
            <text:p>5. Observe delete button visibility</text:p>
            <text:p>6. Attempt to click delete button (if visible)</text:p>
            <text:p>7. OR directly call DELETE /api/products/1/ endpoint</text:p>
          </table:table-cell>
          <table:table-cell table:style-name="ce10" office:value-type="string" calcext:value-type="string">
            <text:p>Staff user can view products</text:p>
            <text:p>Delete button is NOT visible in UI (hidden for staff)</text:p>
            <text:p>If delete button exists, clicking it should show permission error</text:p>
            <text:p>Direct API call to DELETE /api/products/1/ returns 403 Forbidden</text:p>
            <text:p>Error message: "You do not have permission to perform this action"</text:p>
            <text:p>Product is NOT deleted from database</text:p>
            <text:p>Only Admin users can delete products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RBAC-35</text:p>
          </table:table-cell>
          <table:table-cell table:style-name="ce10" office:value-type="string" calcext:value-type="string">
            <text:p>User Role Escalation Prevention</text:p>
          </table:table-cell>
          <table:table-cell table:style-name="ce11" office:value-type="string" calcext:value-type="string">
            <text:p>Role-Based Access Control </text:p>
          </table:table-cell>
          <table:table-cell table:style-name="ce12" office:value-type="string" calcext:value-type="string">
            <text:p>UC-06 Role-Based Access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taff user is logged in; User cannot elevate their own role; System prevents privilege escalation</text:p>
          </table:table-cell>
          <table:table-cell table:style-name="ce10" office:value-type="string" calcext:value-type="string">
            <text:p>Username: staff_user@company.com</text:p>
            <text:p>Current Role: Staff</text:p>
            <text:p>Attempted New Role: Admin</text:p>
          </table:table-cell>
          <table:table-cell table:style-name="ce10" office:value-type="string" calcext:value-type="string">
            <text:p>1. Login with staff_user@company.com (Staff role)</text:p>
            <text:p>2. Attempt to access user profile/settings</text:p>
            <text:p>3. Observe if role field is editable</text:p>
            <text:p>4. If editable, attempt to change role from "Staff" to "Admin"</text:p>
            <text:p>5. Attempt to save changes</text:p>
            <text:p>6. OR use API: PATCH /api/users/me/ with {"role": "admin"}</text:p>
          </table:table-cell>
          <table:table-cell table:style-name="ce10" office:value-type="string" calcext:value-type="string">
            <text:p>Staff user cannot modify their own role</text:p>
            <text:p>Role field is read-only or not visible in profile edit</text:p>
            <text:p>API call to PATCH with role change returns 403 Forbidden</text:p>
            <text:p>Error message: "You do not have permission to modify role"</text:p>
            <text:p>Role remains "Staff" in database</text:p>
            <text:p>Only Admin can change user role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36</text:p>
          </table:table-cell>
          <table:table-cell table:style-name="ce10" office:value-type="string" calcext:value-type="string">
            <text:p>Email Format Validation - Valid Email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Registration or login page is accessible; Email validation is enforced</text:p>
          </table:table-cell>
          <table:table-cell table:style-name="ce10" office:value-type="string" calcext:value-type="string">
            <text:p>Valid emails: user@company.com, john.doe@example.co.uk, user+tag@domain.org</text:p>
          </table:table-cell>
          <table:table-cell table:style-name="ce10" office:value-type="string" calcext:value-type="string">
            <text:p>1. Navigate to registration page</text:p>
            <text:p>2. Enter email "user@company.com"</text:p>
            <text:p>3. Enter other required fields with valid data</text:p>
            <text:p>4. Click submit</text:p>
            <text:p>5. Verify acceptance</text:p>
            <text:p>6. Repeat with "john.doe@example.co.uk"</text:p>
            <text:p>7. Repeat with "user+tag@domain.org"</text:p>
          </table:table-cell>
          <table:table-cell table:style-name="ce10" office:value-type="string" calcext:value-type="string">
            <text:p>All valid email formats are accepted</text:p>
            <text:p>No error messages for valid emails</text:p>
            <text:p>Form submission succeeds</text:p>
            <text:p>User is created in database</text:p>
            <text:p>Email is stored correctly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37</text:p>
          </table:table-cell>
          <table:table-cell table:style-name="ce10" office:value-type="string" calcext:value-type="string">
            <text:p>Email Format Validation - Invalid Formats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Registration page is accessible; Email format validation is enforced</text:p>
          </table:table-cell>
          <table:table-cell table:style-name="ce10" office:value-type="string" calcext:value-type="string">
            <text:p>Invalid emails:</text:p>
            <text:p>- user@domain (missing TLD)</text:p>
            <text:p>- user@.com (missing domain)</text:p>
            <text:p>- user domain@company.com (space in address)</text:p>
            <text:p>- @company.com (missing user)</text:p>
            <text:p>- user..name@company.com (consecutive dots)</text:p>
          </table:table-cell>
          <table:table-cell table:style-name="ce10" office:value-type="string" calcext:value-type="string">
            <text:p>1. Navigate to registration page</text:p>
            <text:p>2. Enter invalid email "user@domain"</text:p>
            <text:p>3. Click submit</text:p>
            <text:p>4. Observe error</text:p>
            <text:p>5. Correct to "user@.com"</text:p>
            <text:p>6. Click submit</text:p>
            <text:p>7. Continue with other invalid formats</text:p>
          </table:table-cell>
          <table:table-cell table:style-name="ce10" office:value-type="string" calcext:value-type="string">
            <text:p>All invalid email formats are rejected</text:p>
            <text:p>Error message: "Please enter a valid email address"</text:p>
            <text:p>Form submission is blocked</text:p>
            <text:p>User is not created in database</text:p>
            <text:p>Field is highlighted with error stat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38</text:p>
          </table:table-cell>
          <table:table-cell table:style-name="ce10" office:value-type="string" calcext:value-type="string">
            <text:p>Password Strength Validation - All Requirements Met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ration page is accessible; this test verifies security policy compliance because current registration flow may not enforce full complexity</text:p>
          </table:table-cell>
          <table:table-cell table:style-name="ce10" office:value-type="string" calcext:value-type="string">
            <text:p>Valid passwords:</text:p>
            <text:p>- ValidPass123!</text:p>
            <text:p>- MyPassword@2024</text:p>
            <text:p>- SecureP@ss1</text:p>
          </table:table-cell>
          <table:table-cell table:style-name="ce10" office:value-type="string" calcext:value-type="string">
            <text:p>1. Navigate to registration page</text:p>
            <text:p>2. Enter password "ValidPass123!"</text:p>
            <text:p>3. Enter all other required fields</text:p>
            <text:p>4. Click submit</text:p>
            <text:p>5. Repeat with "MyPassword@2024"</text:p>
            <text:p>6. Repeat with "SecureP@ss1"</text:p>
          </table:table-cell>
          <table:table-cell table:style-name="ce10" office:value-type="string" calcext:value-type="string">
            <text:p>Passwords meeting complexity requirements are accepted</text:p>
            <text:p>Form submission succeeds</text:p>
            <text:p>If weak passwords are also accepted in registration, raise security defect for missing backend complexity enforcement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39</text:p>
          </table:table-cell>
          <table:table-cell table:style-name="ce10" office:value-type="string" calcext:value-type="string">
            <text:p>Password Validation - Missing Uppercase Letter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ration page is accessible; uppercase requirement should be enforced by backend security policy</text:p>
          </table:table-cell>
          <table:table-cell table:style-name="ce10" office:value-type="string" calcext:value-type="string">
            <text:p>Invalid password: validpass123! (no uppercase letter)</text:p>
          </table:table-cell>
          <table:table-cell table:style-name="ce10" office:value-type="string" calcext:value-type="string">
            <text:p>1. Navigate to registration page</text:p>
            <text:p>2. Enter password "validpass123!"</text:p>
            <text:p>3. Enter other required fields</text:p>
            <text:p>4. Click submit</text:p>
          </table:table-cell>
          <table:table-cell table:style-name="ce10" office:value-type="string" calcext:value-type="string">
            <text:p>Expected by security policy: password is rejected with uppercase validation message</text:p>
            <text:p>If registration succeeds, log defect: "Missing uppercase rule not enforced in registration"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0</text:p>
          </table:table-cell>
          <table:table-cell table:style-name="ce10" office:value-type="string" calcext:value-type="string">
            <text:p>Password Validation - Missing Number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ration page is accessible; number requirement should be enforced by backend security policy</text:p>
          </table:table-cell>
          <table:table-cell table:style-name="ce10" office:value-type="string" calcext:value-type="string">
            <text:p>Invalid password: ValidPass! (no numbers)</text:p>
          </table:table-cell>
          <table:table-cell table:style-name="ce10" office:value-type="string" calcext:value-type="string">
            <text:p>1. Navigate to registration page</text:p>
            <text:p>2. Enter password "ValidPass!"</text:p>
            <text:p>3. Enter other required fields</text:p>
            <text:p>4. Click submit</text:p>
          </table:table-cell>
          <table:table-cell table:style-name="ce10" office:value-type="string" calcext:value-type="string">
            <text:p>Expected by security policy: password is rejected with number validation message</text:p>
            <text:p>If registration succeeds, log defect: "Missing number rule not enforced in registration"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1</text:p>
          </table:table-cell>
          <table:table-cell table:style-name="ce10" office:value-type="string" calcext:value-type="string">
            <text:p>Password Validation - Missing Special Character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ration page is accessible; special-character requirement should be enforced by backend security policy</text:p>
          </table:table-cell>
          <table:table-cell table:style-name="ce10" office:value-type="string" calcext:value-type="string">
            <text:p>Invalid password: ValidPass123 (no special character)</text:p>
          </table:table-cell>
          <table:table-cell table:style-name="ce10" office:value-type="string" calcext:value-type="string">
            <text:p>1. Navigate to registration page</text:p>
            <text:p>2. Enter password "ValidPass123"</text:p>
            <text:p>3. Enter other required fields</text:p>
            <text:p>4. Click submit</text:p>
          </table:table-cell>
          <table:table-cell table:style-name="ce10" office:value-type="string" calcext:value-type="string">
            <text:p>Expected by security policy: password is rejected with special-character validation message</text:p>
            <text:p>If registration succeeds, log defect: "Special-character rule not enforced in registration"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2</text:p>
          </table:table-cell>
          <table:table-cell table:style-name="ce10" office:value-type="string" calcext:value-type="string">
            <text:p>XSS Prevention - Script Tag Injection in Name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Registration page is accessible; XSS prevention measures are implemented</text:p>
          </table:table-cell>
          <table:table-cell table:style-name="ce10" office:value-type="string" calcext:value-type="string">
            <text:p>First Name: John&lt;script&gt;alert('XSS')&lt;/script&gt;</text:p>
          </table:table-cell>
          <table:table-cell table:style-name="ce10" office:value-type="string" calcext:value-type="string">
            <text:p>1. Navigate to registration page</text:p>
            <text:p>2. Enter first name: "John&lt;script&gt;alert('XSS')&lt;/script&gt;"</text:p>
            <text:p>3. Enter other required fields</text:p>
            <text:p>4. Click submit</text:p>
            <text:p>5. Observe if alert popup appears</text:p>
          </table:table-cell>
          <table:table-cell table:style-name="ce10" office:value-type="string" calcext:value-type="string">
            <text:p>No alert popup is displayed (XSS is prevented)</text:p>
            <text:p>Form submission either blocks or sanitizes</text:p>
            <text:p>Error message: "Name contains invalid characters" OR script tags are stripped</text:p>
            <text:p>User is not created OR created with sanitized name</text:p>
            <text:p>Database integrity is maintained (no script code stored)</text:p>
            <text:p>Frontend rendering is safe (HTML entities encoded)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3</text:p>
          </table:table-cell>
          <table:table-cell table:style-name="ce10" office:value-type="string" calcext:value-type="string">
            <text:p>SQL Injection Prevention in Login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Login page is accessible; SQL injection prevention is implemented (parameterized queries)</text:p>
          </table:table-cell>
          <table:table-cell table:style-name="ce10" office:value-type="string" calcext:value-type="string">
            <text:p>Email: admin' OR '1'='1</text:p>
            <text:p>Password: ' OR '1'='1</text:p>
          </table:table-cell>
          <table:table-cell table:style-name="ce10" office:value-type="string" calcext:value-type="string">
            <text:p>1. Navigate to login page</text:p>
            <text:p>2. Enter email: "admin' OR '1'='1"</text:p>
            <text:p>3. Enter password: "' OR '1'='1"</text:p>
            <text:p>4. Click login</text:p>
            <text:p>5. Observe response</text:p>
          </table:table-cell>
          <table:table-cell table:style-name="ce10" office:value-type="string" calcext:value-type="string">
            <text:p>Login fails (SQL injection is prevented)</text:p>
            <text:p>Error message: "Invalid email or password" (generic)</text:p>
            <text:p>No database error details are exposed</text:p>
            <text:p>No unintended database access occurs</text:p>
            <text:p>Logs show security attempt</text:p>
            <text:p>User is not logged in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4</text:p>
          </table:table-cell>
          <table:table-cell table:style-name="ce10" office:value-type="string" calcext:value-type="string">
            <text:p>Username Uniqueness Validation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4" office:value-type="string" calcext:value-type="string">
            <text:p>Nega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Registration page is accessible; User "john_doe" already exists in system</text:p>
          </table:table-cell>
          <table:table-cell table:style-name="ce10" office:value-type="string" calcext:value-type="string">
            <text:p>Username: john_doe (duplicate)</text:p>
            <text:p>Email: newemail@company.com</text:p>
          </table:table-cell>
          <table:table-cell table:style-name="ce10" office:value-type="string" calcext:value-type="string">
            <text:p>1. Navigate to registration page</text:p>
            <text:p>2. Enter username "john_doe" (already taken)</text:p>
            <text:p>3. Enter new email "newemail@company.com"</text:p>
            <text:p>4. Enter other required fields</text:p>
            <text:p>5. Click submit</text:p>
          </table:table-cell>
          <table:table-cell table:style-name="ce10" office:value-type="string" calcext:value-type="string">
            <text:p>Form submission is blocked</text:p>
            <text:p>Error message: "Username is already taken"</text:p>
            <text:p>User remains on registration page</text:p>
            <text:p>User is not created in database</text:p>
            <text:p>User can choose different username and retry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VALID-45</text:p>
          </table:table-cell>
          <table:table-cell table:style-name="ce10" office:value-type="string" calcext:value-type="string">
            <text:p>Phone Number Format Validation</text:p>
          </table:table-cell>
          <table:table-cell table:style-name="ce11" office:value-type="string" calcext:value-type="string">
            <text:p>Input Validation </text:p>
          </table:table-cell>
          <table:table-cell table:style-name="ce12" office:value-type="string" calcext:value-type="string">
            <text:p>UC-07 Input Validation</text:p>
          </table:table-cell>
          <table:table-cell table:style-name="ce15" office:value-type="string" calcext:value-type="string">
            <text:p>Edg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Registration page is accessible; Phone number validation is configured</text:p>
          </table:table-cell>
          <table:table-cell table:style-name="ce10" office:value-type="string" calcext:value-type="string">
            <text:p>Valid: +1-555-0100, +91-9876543210, 555-0100</text:p>
            <text:p>Invalid: abc, 123, +1-555 (incomplete)</text:p>
          </table:table-cell>
          <table:table-cell table:style-name="ce10" office:value-type="string" calcext:value-type="string">
            <text:p>1. Navigate to registration page</text:p>
            <text:p>2. Test valid format: "+1-555-0100"</text:p>
            <text:p>3. Submit and verify acceptance</text:p>
            <text:p>4. Clear and test invalid: "abc"</text:p>
            <text:p>5. Submit and verify rejection</text:p>
          </table:table-cell>
          <table:table-cell table:style-name="ce10" office:value-type="string" calcext:value-type="string">
            <text:p>Valid phone formats are accepted</text:p>
            <text:p>Invalid phone formats are rejected with error: "Invalid phone number format"</text:p>
            <text:p>Accepted formats: +1-555-0100, +91-9876543210</text:p>
            <text:p>Rejected formats: abc, 123 (too short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DASH-46</text:p>
          </table:table-cell>
          <table:table-cell table:style-name="ce10" office:value-type="string" calcext:value-type="string">
            <text:p>Dashboard Load and Display After Login</text:p>
          </table:table-cell>
          <table:table-cell table:style-name="ce11" office:value-type="string" calcext:value-type="string">
            <text:p>Dashboard </text:p>
          </table:table-cell>
          <table:table-cell table:style-name="ce12" office:value-type="string" calcext:value-type="string">
            <text:p>UC-08 Dashboard Navig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 with valid credentials; Dashboard is the default landing page</text:p>
          </table:table-cell>
          <table:table-cell table:style-name="ce10" office:value-type="string" calcext:value-type="string">
            <text:p>Username: staff_user@company.com</text:p>
            <text:p>Password: ValidPass123!</text:p>
          </table:table-cell>
          <table:table-cell table:style-name="ce10" office:value-type="string" calcext:value-type="string">
            <text:p>1. User logs in successfully</text:p>
            <text:p>2. User is redirected to dashboard (/)</text:p>
            <text:p>3. Wait for page to fully load</text:p>
            <text:p>4. Verify all dashboard elements are visible</text:p>
          </table:table-cell>
          <table:table-cell table:style-name="ce10" office:value-type="string" calcext:value-type="string">
            <text:p>Dashboard loads successfully</text:p>
            <text:p>Page displays without errors</text:p>
            <text:p>Navigation sidebar is visible and populated</text:p>
            <text:p>User's name appears in navbar</text:p>
            <text:p>All dashboard widgets/cards are rendered</text:p>
            <text:p>Charts and statistics load correctly</text:p>
            <text:p>No console errors in browser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3">
          <table:table-cell table:style-name="ce7" office:value-type="string" calcext:value-type="string">
            <text:p>TC-DASH-47</text:p>
          </table:table-cell>
          <table:table-cell table:style-name="ce10" office:value-type="string" calcext:value-type="string">
            <text:p>Sidebar Navigation - Access All Modules</text:p>
          </table:table-cell>
          <table:table-cell table:style-name="ce11" office:value-type="string" calcext:value-type="string">
            <text:p>Dashboard </text:p>
          </table:table-cell>
          <table:table-cell table:style-name="ce12" office:value-type="string" calcext:value-type="string">
            <text:p>UC-08 Dashboard Navig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Sidebar navigation is displayed; User has access to all relevant modules</text:p>
          </table:table-cell>
          <table:table-cell table:style-name="ce10" office:value-type="string" calcext:value-type="string">
            <text:p>Username: staff_user@company.com</text:p>
            <text:p>Password: ValidPass123!</text:p>
          </table:table-cell>
          <table:table-cell table:style-name="ce10" office:value-type="string" calcext:value-type="string">
            <text:p>1. Login successfully</text:p>
            <text:p>2. Verify sidebar is visible</text:p>
            <text:p>3. Click on "Products" menu item</text:p>
            <text:p>4. Verify navigation to /products</text:p>
            <text:p>5. Click on "Sales" menu item</text:p>
            <text:p>6. Verify navigation to /sales</text:p>
            <text:p>7. Click on "Customers" menu item</text:p>
            <text:p>8. Verify navigation to /customers</text:p>
            <text:p>9. Verify "Inventory" dropdown opens</text:p>
            <text:p>10. Click "Stock Movement"</text:p>
            <text:p>11. Verify navigation to /stock-movement</text:p>
            <text:p>12. Click "Suppliers"</text:p>
            <text:p>13. Verify navigation to /suppliers</text:p>
            <text:p>14. Click "Categories"</text:p>
            <text:p>15. Verify navigation to /categories</text:p>
          </table:table-cell>
          <table:table-cell table:style-name="ce10" office:value-type="string" calcext:value-type="string">
            <text:p>All navigation links are clickable</text:p>
            <text:p>Navigation updates URL correctly</text:p>
            <text:p>Page content changes appropriately</text:p>
            <text:p>Active menu item is highlighted</text:p>
            <text:p>No navigation errors occur</text:p>
            <text:p>Back button works correctly</text:p>
            <text:p>All modules load successfully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DASH-48</text:p>
          </table:table-cell>
          <table:table-cell table:style-name="ce10" office:value-type="string" calcext:value-type="string">
            <text:p>Theme Toggle (Light/Dark/System)</text:p>
          </table:table-cell>
          <table:table-cell table:style-name="ce11" office:value-type="string" calcext:value-type="string">
            <text:p>Dashboard </text:p>
          </table:table-cell>
          <table:table-cell table:style-name="ce12" office:value-type="string" calcext:value-type="string">
            <text:p>UC-08 Dashboard Navigation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is logged in; Theme dropdown is visible in navbar; System supports Light, Dark, and System modes</text:p>
          </table:table-cell>
          <table:table-cell table:style-name="ce10" office:value-type="string" calcext:value-type="string">
            <text:p>Themes: Light, Dark, System</text:p>
          </table:table-cell>
          <table:table-cell table:style-name="ce10" office:value-type="string" calcext:value-type="string">
            <text:p>1. Login successfully</text:p>
            <text:p>2. Locate theme toggle in navbar (Sun/Moon icon)</text:p>
            <text:p>3. Click theme dropdown</text:p>
            <text:p>4. Select "Light" theme</text:p>
            <text:p>5. Verify page appearance changes to light mode</text:p>
            <text:p>6. Select "Dark" theme</text:p>
            <text:p>7. Verify page appearance changes to dark mode</text:p>
            <text:p>8. Select "System" theme</text:p>
            <text:p>9. Verify theme follows system preference</text:p>
            <text:p>10. Refresh page</text:p>
            <text:p>11. Verify theme persists after reload</text:p>
          </table:table-cell>
          <table:table-cell table:style-name="ce10" office:value-type="string" calcext:value-type="string">
            <text:p>Theme dropdown is accessible</text:p>
            <text:p>Light theme applies light colors and dark text</text:p>
            <text:p>Dark theme applies dark colors and light text</text:p>
            <text:p>System theme follows OS setting</text:p>
            <text:p>Theme preference is persisted in localStorage/cookies</text:p>
            <text:p>Theme change is instant without page reload</text:p>
            <text:p>All UI elements are visible in both themes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ROD-49</text:p>
          </table:table-cell>
          <table:table-cell table:style-name="ce10" office:value-type="string" calcext:value-type="string">
            <text:p>View Product List with Pagination</text:p>
          </table:table-cell>
          <table:table-cell table:style-name="ce11" office:value-type="string" calcext:value-type="string">
            <text:p>Product Management </text:p>
          </table:table-cell>
          <table:table-cell table:style-name="ce12" office:value-type="string" calcext:value-type="string">
            <text:p>UC-09 Product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Products exist in database; List page supports pagination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Login successfully</text:p>
            <text:p>2. Navigate to /products page</text:p>
            <text:p>3. Wait for product list to load</text:p>
            <text:p>4. Verify products are displayed in table format</text:p>
            <text:p>5. Observe pagination controls</text:p>
            <text:p>6. Click "Load More" button</text:p>
            <text:p>7. Verify more products are loaded</text:p>
            <text:p>8. Scroll through product list</text:p>
          </table:table-cell>
          <table:table-cell table:style-name="ce10" office:value-type="string" calcext:value-type="string">
            <text:p>Product list loads successfully</text:p>
            <text:p>Products display with: Name, SKU, Category, Supplier, Stock, Price</text:p>
            <text:p>Initial batch of products is visible</text:p>
            <text:p>"Load More" button is functional</text:p>
            <text:p>Clicking Load More fetches next batch</text:p>
            <text:p>No duplicate products are shown</text:p>
            <text:p>Infinite scroll/pagination works smoothly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ROD-50</text:p>
          </table:table-cell>
          <table:table-cell table:style-name="ce10" office:value-type="string" calcext:value-type="string">
            <text:p>Create New Product</text:p>
          </table:table-cell>
          <table:table-cell table:style-name="ce11" office:value-type="string" calcext:value-type="string">
            <text:p>Product Management </text:p>
          </table:table-cell>
          <table:table-cell table:style-name="ce12" office:value-type="string" calcext:value-type="string">
            <text:p>UC-09 Product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 with Admin/Manager role; /products page is accessible; Create button is visible</text:p>
          </table:table-cell>
          <table:table-cell table:style-name="ce10" office:value-type="string" calcext:value-type="string">
            <text:p>Product Name: Wireless Keyboard</text:p>
            <text:p>SKU: KEYBOARD-001</text:p>
            <text:p>Category: Electronics</text:p>
            <text:p>Supplier: Tech Supplies Inc</text:p>
            <text:p>Cost Price: 1500</text:p>
            <text:p>Selling Price: 2500</text:p>
            <text:p>Stock Quantity: 50</text:p>
            <text:p>Low Stock Limit: 10</text:p>
            <text:p>Description: Ergonomic wireless keyboard with USB receiver</text:p>
          </table:table-cell>
          <table:table-cell table:style-name="ce10" office:value-type="string" calcext:value-type="string">
            <text:p>1. Login as staff_user@company.com</text:p>
            <text:p>2. Navigate to /products</text:p>
            <text:p>3. Click "Create Product" or "+" button</text:p>
            <text:p>4. Verify create product form opens</text:p>
            <text:p>5. Enter product name "Wireless Keyboard"</text:p>
            <text:p>6. Enter SKU "KEYBOARD-001"</text:p>
            <text:p>7. Select category "Electronics"</text:p>
            <text:p>8. Select supplier "Tech Supplies Inc"</text:p>
            <text:p>9. Enter cost price "1500"</text:p>
            <text:p>10. Enter selling price "2500"</text:p>
            <text:p>11. Enter stock "50"</text:p>
            <text:p>12. Enter low stock limit "10"</text:p>
            <text:p>13. Enter description</text:p>
            <text:p>14. Click "Save" or "Create" button</text:p>
          </table:table-cell>
          <table:table-cell table:style-name="ce10" office:value-type="string" calcext:value-type="string">
            <text:p>Form validation passes</text:p>
            <text:p>Product is created successfully</text:p>
            <text:p>Success message displayed: "Product created successfully"</text:p>
            <text:p>User is redirected to product detail page</text:p>
            <text:p>New product appears in product list</text:p>
            <text:p>All entered data is saved correctly</text:p>
            <text:p>Product ID is generate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ROD-51</text:p>
          </table:table-cell>
          <table:table-cell table:style-name="ce10" office:value-type="string" calcext:value-type="string">
            <text:p>Update Existing Product</text:p>
          </table:table-cell>
          <table:table-cell table:style-name="ce11" office:value-type="string" calcext:value-type="string">
            <text:p>Product Management </text:p>
          </table:table-cell>
          <table:table-cell table:style-name="ce12" office:value-type="string" calcext:value-type="string">
            <text:p>UC-09 Product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 with Admin/Manager role; Product exists in system; Edit page is accessible</text:p>
          </table:table-cell>
          <table:table-cell table:style-name="ce10" office:value-type="string" calcext:value-type="string">
            <text:p>Product ID: 1</text:p>
            <text:p>Current Name: Wireless Keyboard</text:p>
            <text:p>Updated Name: Premium Wireless Keyboard</text:p>
            <text:p>Updated Price: 3000</text:p>
          </table:table-cell>
          <table:table-cell table:style-name="ce10" office:value-type="string" calcext:value-type="string">
            <text:p>1. Login successfully</text:p>
            <text:p>2. Navigate to /products</text:p>
            <text:p>3. Click on product "Wireless Keyboard"</text:p>
            <text:p>4. Verify product detail page loads</text:p>
            <text:p>5. Click "Edit" button</text:p>
            <text:p>6. Verify edit form opens with existing data</text:p>
            <text:p>7. Change product name to "Premium Wireless Keyboard"</text:p>
            <text:p>8. Change selling price to "3000"</text:p>
            <text:p>9. Click "Save" or "Update" button</text:p>
          </table:table-cell>
          <table:table-cell table:style-name="ce10" office:value-type="string" calcext:value-type="string">
            <text:p>Edit form loads with current data</text:p>
            <text:p>Form fields are editable</text:p>
            <text:p>Changes are submitted successfully</text:p>
            <text:p>Success message: "Product updated successfully"</text:p>
            <text:p>Product detail page reflects new data</text:p>
            <text:p>Updated product list shows new name/price</text:p>
            <text:p>Edit history is logged (if tracked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ROD-52</text:p>
          </table:table-cell>
          <table:table-cell table:style-name="ce10" office:value-type="string" calcext:value-type="string">
            <text:p>View Product Details and Related Sales</text:p>
          </table:table-cell>
          <table:table-cell table:style-name="ce11" office:value-type="string" calcext:value-type="string">
            <text:p>Product Management </text:p>
          </table:table-cell>
          <table:table-cell table:style-name="ce12" office:value-type="string" calcext:value-type="string">
            <text:p>UC-09 Product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Product exists with sales history; Detail page shows related data</text:p>
          </table:table-cell>
          <table:table-cell table:style-name="ce10" office:value-type="string" calcext:value-type="string">
            <text:p>Product ID: 1 (Laptop)</text:p>
            <text:p>Product Name: Laptop</text:p>
          </table:table-cell>
          <table:table-cell table:style-name="ce10" office:value-type="string" calcext:value-type="string">
            <text:p>1. Login successfully</text:p>
            <text:p>2. Navigate to /products</text:p>
            <text:p>3. Click on product "Laptop"</text:p>
            <text:p>4. Wait for product detail page to load</text:p>
            <text:p>5. Verify basic product info displays</text:p>
            <text:p>6. Scroll down to see related sales</text:p>
            <text:p>7. Verify sales table shows: Invoice#, Customer, Payment Status, Qty, Total</text:p>
            <text:p>8. Click on a related sale to view details</text:p>
          </table:table-cell>
          <table:table-cell table:style-name="ce10" office:value-type="string" calcext:value-type="string">
            <text:p>Product detail page loads with complete info</text:p>
            <text:p>Product name, SKU, category, supplier displayed</text:p>
            <text:p>Stock level and pricing shown</text:p>
            <text:p>Related sales table loads</text:p>
            <text:p>Sales linked to product are displayed</text:p>
            <text:p>Clicking sale shows sale detail page</text:p>
            <text:p>Analytics/charts for product sales visible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PROD-53</text:p>
          </table:table-cell>
          <table:table-cell table:style-name="ce10" office:value-type="string" calcext:value-type="string">
            <text:p>Delete Product (Admin Only)</text:p>
          </table:table-cell>
          <table:table-cell table:style-name="ce11" office:value-type="string" calcext:value-type="string">
            <text:p>Product Management </text:p>
          </table:table-cell>
          <table:table-cell table:style-name="ce12" office:value-type="string" calcext:value-type="string">
            <text:p>UC-09 Product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 with Admin role; Product exists; Delete button is visible for admin</text:p>
          </table:table-cell>
          <table:table-cell table:style-name="ce10" office:value-type="string" calcext:value-type="string">
            <text:p>Product ID: 99 (Test Product)</text:p>
            <text:p>Product Name: Obsolete Item</text:p>
          </table:table-cell>
          <table:table-cell table:style-name="ce10" office:value-type="string" calcext:value-type="string">
            <text:p>1. Login as admin_user@company.com</text:p>
            <text:p>2. Navigate to /products</text:p>
            <text:p>3. Click on product "Obsolete Item"</text:p>
            <text:p>4. Click "Delete" button on detail page</text:p>
            <text:p>5. Verify confirmation dialog appears</text:p>
            <text:p>6. Click "Confirm Delete" button</text:p>
          </table:table-cell>
          <table:table-cell table:style-name="ce10" office:value-type="string" calcext:value-type="string">
            <text:p>Delete button is visible for admin</text:p>
            <text:p>Confirmation dialog appears with message: "Are you sure you want to delete this product?"</text:p>
            <text:p>Product is deleted from database</text:p>
            <text:p>Success message displayed</text:p>
            <text:p>User is redirected to product list</text:p>
            <text:p>Deleted product no longer appears in list</text:p>
            <text:p>Confirmation prevents accidental deletion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ALES-54</text:p>
          </table:table-cell>
          <table:table-cell table:style-name="ce10" office:value-type="string" calcext:value-type="string">
            <text:p>View Sales List with Filters</text:p>
          </table:table-cell>
          <table:table-cell table:style-name="ce11" office:value-type="string" calcext:value-type="string">
            <text:p>Sales Management </text:p>
          </table:table-cell>
          <table:table-cell table:style-name="ce12" office:value-type="string" calcext:value-type="string">
            <text:p>UC-10 Sales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Sales records exist in database; Filter panel is accessibl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Login successfully</text:p>
            <text:p>2. Navigate to /sales page</text:p>
            <text:p>3. Wait for sales list to load</text:p>
            <text:p>4. Verify sales table displays</text:p>
            <text:p>5. Verify filter panel is visible</text:p>
            <text:p>6. Apply filter by payment status "Pending"</text:p>
            <text:p>7. Verify list updates to show only pending sales</text:p>
            <text:p>8. Apply filter by date range</text:p>
            <text:p>9. Verify list updates correctly</text:p>
            <text:p>10. Click "Load More" to paginate</text:p>
          </table:table-cell>
          <table:table-cell table:style-name="ce10" office:value-type="string" calcext:value-type="string">
            <text:p>Sales list loads with: Invoice#, Customer, Staff, Discount, Total, Payment Status</text:p>
            <text:p>Filter controls are functional</text:p>
            <text:p>Filtering updates list without page reload</text:p>
            <text:p>Multiple filters can be applied</text:p>
            <text:p>Pagination works correctly</text:p>
            <text:p>No sales data from other statuses appear when filtered</text:p>
            <text:p>Filter values are preserved during pagination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4">
          <table:table-cell table:style-name="ce7" office:value-type="string" calcext:value-type="string">
            <text:p>TC-SALES-55</text:p>
          </table:table-cell>
          <table:table-cell table:style-name="ce10" office:value-type="string" calcext:value-type="string">
            <text:p>Create New Sale with Items</text:p>
          </table:table-cell>
          <table:table-cell table:style-name="ce11" office:value-type="string" calcext:value-type="string">
            <text:p>Sales Management </text:p>
          </table:table-cell>
          <table:table-cell table:style-name="ce12" office:value-type="string" calcext:value-type="string">
            <text:p>UC-10 Sales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Products, customers, and users exist; Create sale form is accessible</text:p>
          </table:table-cell>
          <table:table-cell table:style-name="ce10" office:value-type="string" calcext:value-type="string">
            <text:p>Customer: John Smith</text:p>
            <text:p>Staff: staff_user</text:p>
            <text:p>Payment Method: Card</text:p>
            <text:p>Payment Status: Completed</text:p>
            <text:p>Item 1: Laptop (Qty: 2, Unit Price: 50000)</text:p>
            <text:p>Item 2: Keyboard (Qty: 5, Unit Price: 2500)</text:p>
            <text:p>Discount: 5000</text:p>
            <text:p>Notes: Bulk order</text:p>
          </table:table-cell>
          <table:table-cell table:style-name="ce10" office:value-type="string" calcext:value-type="string">
            <text:p>1. Login successfully</text:p>
            <text:p>2. Navigate to /sales page</text:p>
            <text:p>3. Click "Create Sale" or "New Sale" button</text:p>
            <text:p>4. Verify create sale form opens</text:p>
            <text:p>5. Select customer "John Smith"</text:p>
            <text:p>6. Select staff member</text:p>
            <text:p>7. Click "Add Item" or similar</text:p>
            <text:p>8. Select product "Laptop"</text:p>
            <text:p>9. Enter quantity "2"</text:p>
            <text:p>10. Verify unit price is populated</text:p>
            <text:p>11. Click "Add Item" again</text:p>
            <text:p>12. Select product "Keyboard"</text:p>
            <text:p>13. Enter quantity "5"</text:p>
            <text:p>14. Enter discount amount "5000"</text:p>
            <text:p>15. Select payment method "Card"</text:p>
            <text:p>16. Select payment status "Completed"</text:p>
            <text:p>17. Enter notes "Bulk order"</text:p>
            <text:p>18. Click "Save" or "Complete Sale"</text:p>
          </table:table-cell>
          <table:table-cell table:style-name="ce10" office:value-type="string" calcext:value-type="string">
            <text:p>Sale form loads successfully</text:p>
            <text:p>Items are added to sale dynamically</text:p>
            <text:p>Unit prices are auto-populated from products</text:p>
            <text:p>Line totals are calculated correctly</text:p>
            <text:p>Grand total includes discount</text:p>
            <text:p>Sale is created successfully</text:p>
            <text:p>Success message displayed</text:p>
            <text:p>Sale appears in sales list with Invoice#</text:p>
            <text:p>Stock levels are updated (2 Laptops, 5 Keyboards reduced)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ALES-56</text:p>
          </table:table-cell>
          <table:table-cell table:style-name="ce10" office:value-type="string" calcext:value-type="string">
            <text:p>View Sale Detail and Invoice</text:p>
          </table:table-cell>
          <table:table-cell table:style-name="ce11" office:value-type="string" calcext:value-type="string">
            <text:p>Sales Management </text:p>
          </table:table-cell>
          <table:table-cell table:style-name="ce12" office:value-type="string" calcext:value-type="string">
            <text:p>UC-10 Sales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Sale exists with items; Invoice can be viewed/downloaded</text:p>
          </table:table-cell>
          <table:table-cell table:style-name="ce10" office:value-type="string" calcext:value-type="string">
            <text:p>Invoice ID: INV-001</text:p>
          </table:table-cell>
          <table:table-cell table:style-name="ce10" office:value-type="string" calcext:value-type="string">
            <text:p>1. Login successfully</text:p>
            <text:p>2. Navigate to /sales</text:p>
            <text:p>3. Click on sale "INV-001"</text:p>
            <text:p>4. Wait for detail page to load</text:p>
            <text:p>5. Verify sale header shows invoice#, customer, date, staff</text:p>
            <text:p>6. Verify sale items are listed with qty, price, total</text:p>
            <text:p>7. Verify totals section shows subtotal, discount, tax, grand total</text:p>
            <text:p>8. Click "Download Invoice" button</text:p>
            <text:p>9. Verify PDF/file downloads</text:p>
          </table:table-cell>
          <table:table-cell table:style-name="ce10" office:value-type="string" calcext:value-type="string">
            <text:p>Sale detail page loads completely</text:p>
            <text:p>All sale information is displayed</text:p>
            <text:p>Items show accurate quantities and prices</text:p>
            <text:p>Calculations are correct</text:p>
            <text:p>Invoice download button is functional</text:p>
            <text:p>PDF file is generated with proper formatting</text:p>
            <text:p>Invoice includes company details and sale info</text:p>
            <text:p>Invoice can be printe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SALES-57</text:p>
          </table:table-cell>
          <table:table-cell table:style-name="ce10" office:value-type="string" calcext:value-type="string">
            <text:p>Download Sales Report (CSV)</text:p>
          </table:table-cell>
          <table:table-cell table:style-name="ce11" office:value-type="string" calcext:value-type="string">
            <text:p>Sales Management </text:p>
          </table:table-cell>
          <table:table-cell table:style-name="ce12" office:value-type="string" calcext:value-type="string">
            <text:p>UC-10 Sales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User is logged in; Sales list page has export button; System can generate CSV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Login successfully</text:p>
            <text:p>2. Navigate to /sales page</text:p>
            <text:p>3. Verify sales list is displayed</text:p>
            <text:p>4. Click "Download Sales CSV" or "Export Report" button</text:p>
            <text:p>5. Verify download dialog appears (browser dependent)</text:p>
            <text:p>6. Accept download</text:p>
            <text:p>7. Open downloaded CSV file</text:p>
            <text:p>8. Verify data format and accuracy</text:p>
          </table:table-cell>
          <table:table-cell table:style-name="ce10" office:value-type="string" calcext:value-type="string">
            <text:p>CSV export button is visible</text:p>
            <text:p>CSV file is generated successfully</text:p>
            <text:p>File name format: sales_YYYY-MM-DD.csv or similar</text:p>
            <text:p>CSV contains: Invoice#, Customer, Staff, Amount, Payment Status, Date</text:p>
            <text:p>All sales in list are included</text:p>
            <text:p>Data is properly formatted with commas and quotes</text:p>
            <text:p>File can be opened in Excel/Google Sheet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CUST-58</text:p>
          </table:table-cell>
          <table:table-cell table:style-name="ce10" office:value-type="string" calcext:value-type="string">
            <text:p>View Customer List</text:p>
          </table:table-cell>
          <table:table-cell table:style-name="ce11" office:value-type="string" calcext:value-type="string">
            <text:p>Customer Management </text:p>
          </table:table-cell>
          <table:table-cell table:style-name="ce12" office:value-type="string" calcext:value-type="string">
            <text:p>UC-11 Customer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Customers exist in databas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Login successfully</text:p>
            <text:p>2. Navigate to /customers page</text:p>
            <text:p>3. Wait for customer list to load</text:p>
            <text:p>4. Verify customers display with name, email, phone, address</text:p>
            <text:p>5. Verify pagination/load more works</text:p>
            <text:p>6. Click on a customer name</text:p>
          </table:table-cell>
          <table:table-cell table:style-name="ce10" office:value-type="string" calcext:value-type="string">
            <text:p>Customer list loads successfully</text:p>
            <text:p>All customer columns display correctly</text:p>
            <text:p>Customer data is readable and organized</text:p>
            <text:p>Load more button functions</text:p>
            <text:p>Clicking customer shows detail page</text:p>
            <text:p>No errors during page load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CUST-59</text:p>
          </table:table-cell>
          <table:table-cell table:style-name="ce10" office:value-type="string" calcext:value-type="string">
            <text:p>Create New Customer</text:p>
          </table:table-cell>
          <table:table-cell table:style-name="ce11" office:value-type="string" calcext:value-type="string">
            <text:p>Customer Management </text:p>
          </table:table-cell>
          <table:table-cell table:style-name="ce12" office:value-type="string" calcext:value-type="string">
            <text:p>UC-11 Customer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Create customer form is accessible</text:p>
          </table:table-cell>
          <table:table-cell table:style-name="ce10" office:value-type="string" calcext:value-type="string">
            <text:p>Name: Sarah Wilson</text:p>
            <text:p>Email: sarah.wilson@email.com</text:p>
            <text:p>Phone: +1-555-0200</text:p>
            <text:p>Address: 123 Oak Street, New York, NY</text:p>
            <text:p>City: New York</text:p>
            <text:p>State: NY</text:p>
            <text:p>Zip: 10001</text:p>
            <text:p>Country: USA</text:p>
          </table:table-cell>
          <table:table-cell table:style-name="ce10" office:value-type="string" calcext:value-type="string">
            <text:p>1. Login successfully</text:p>
            <text:p>2. Navigate to /customers</text:p>
            <text:p>3. Click "Create Customer" or "Add Customer" button</text:p>
            <text:p>4. Enter customer name "Sarah Wilson"</text:p>
            <text:p>5. Enter email "sarah.wilson@email.com"</text:p>
            <text:p>6. Enter phone "+1-555-0200"</text:p>
            <text:p>7. Enter address "123 Oak Street"</text:p>
            <text:p>8. Enter city, state, zip</text:p>
            <text:p>9. Click "Save" or "Create" button</text:p>
          </table:table-cell>
          <table:table-cell table:style-name="ce10" office:value-type="string" calcext:value-type="string">
            <text:p>Create form opens successfully</text:p>
            <text:p>All fields are functional</text:p>
            <text:p>Customer is created</text:p>
            <text:p>Success message displayed</text:p>
            <text:p>New customer appears in list</text:p>
            <text:p>Customer detail page is accessibl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CUST-60</text:p>
          </table:table-cell>
          <table:table-cell table:style-name="ce10" office:value-type="string" calcext:value-type="string">
            <text:p>View Customer Detail and Purchase History</text:p>
          </table:table-cell>
          <table:table-cell table:style-name="ce11" office:value-type="string" calcext:value-type="string">
            <text:p>Customer Management </text:p>
          </table:table-cell>
          <table:table-cell table:style-name="ce12" office:value-type="string" calcext:value-type="string">
            <text:p>UC-11 Customer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Customer exists with purchase history</text:p>
          </table:table-cell>
          <table:table-cell table:style-name="ce10" office:value-type="string" calcext:value-type="string">
            <text:p>Customer ID: 1 (John Smith)</text:p>
          </table:table-cell>
          <table:table-cell table:style-name="ce10" office:value-type="string" calcext:value-type="string">
            <text:p>1. Login successfully</text:p>
            <text:p>2. Navigate to /customers</text:p>
            <text:p>3. Click on customer "John Smith"</text:p>
            <text:p>4. Verify detail page loads</text:p>
            <text:p>5. Verify contact info is displayed</text:p>
            <text:p>6. Scroll to see purchase history</text:p>
            <text:p>7. Verify sales list shows invoices by this customer</text:p>
          </table:table-cell>
          <table:table-cell table:style-name="ce10" office:value-type="string" calcext:value-type="string">
            <text:p>Customer detail page loads</text:p>
            <text:p>Contact information is correct</text:p>
            <text:p>Purchase history is displayed</text:p>
            <text:p>Each sale shows: Invoice#, Date, Amount, Payment Status</text:p>
            <text:p>Customer can navigate back to list</text:p>
            <text:p>All linked sales are shown accurately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INVENT-61</text:p>
          </table:table-cell>
          <table:table-cell table:style-name="ce10" office:value-type="string" calcext:value-type="string">
            <text:p>View Stock Movement List</text:p>
          </table:table-cell>
          <table:table-cell table:style-name="ce11" office:value-type="string" calcext:value-type="string">
            <text:p>Inventory Management </text:p>
          </table:table-cell>
          <table:table-cell table:style-name="ce12" office:value-type="string" calcext:value-type="string">
            <text:p>UC-12 Inventory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Stock movements exist; Stock movement page is accessibl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1. Login successfully</text:p>
            <text:p>2. Navigate to Inventory &gt; Stock Movement</text:p>
            <text:p>3. Wait for stock movement list to load</text:p>
            <text:p>4. Verify movements display with: Product, Type (IN/OUT), Quantity, Reason, Date, User</text:p>
          </table:table-cell>
          <table:table-cell table:style-name="ce10" office:value-type="string" calcext:value-type="string">
            <text:p>Stock movement list loads</text:p>
            <text:p>All movements display correctly</text:p>
            <text:p>Movement types (IN/OUT) are clear</text:p>
            <text:p>Reasons (SALE, PURCHASE, RETURN, MANUAL, DAMAGED) are shown</text:p>
            <text:p>Dates and user information visible</text:p>
            <text:p>List can be filtered by type/reason/dat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INVENT-62</text:p>
          </table:table-cell>
          <table:table-cell table:style-name="ce10" office:value-type="string" calcext:value-type="string">
            <text:p>Record Stock Movement (Manual IN)</text:p>
          </table:table-cell>
          <table:table-cell table:style-name="ce11" office:value-type="string" calcext:value-type="string">
            <text:p>Inventory Management </text:p>
          </table:table-cell>
          <table:table-cell table:style-name="ce12" office:value-type="string" calcext:value-type="string">
            <text:p>UC-12 Inventory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Product exists; Stock movement form is accessible</text:p>
          </table:table-cell>
          <table:table-cell table:style-name="ce10" office:value-type="string" calcext:value-type="string">
            <text:p>Product: Laptop</text:p>
            <text:p>Movement Type: IN</text:p>
            <text:p>Quantity: 10</text:p>
            <text:p>Reason: PURCHASE</text:p>
          </table:table-cell>
          <table:table-cell table:style-name="ce10" office:value-type="string" calcext:value-type="string">
            <text:p>1. Login successfully</text:p>
            <text:p>2. Navigate to Inventory &gt; Stock Movement</text:p>
            <text:p>3. Click "Record Movement" or "New Movement"</text:p>
            <text:p>4. Select product "Laptop"</text:p>
            <text:p>5. Select type "IN"</text:p>
            <text:p>6. Enter quantity "10"</text:p>
            <text:p>7. Select reason "PURCHASE"</text:p>
            <text:p>8. Click "Save" or "Record"</text:p>
          </table:table-cell>
          <table:table-cell table:style-name="ce10" office:value-type="string" calcext:value-type="string">
            <text:p>Movement form opens</text:p>
            <text:p>Product, type, quantity inputs are functional</text:p>
            <text:p>Movement is recorded</text:p>
            <text:p>Success message displayed</text:p>
            <text:p>Laptop stock increases by 10</text:p>
            <text:p>Movement appears in history</text:p>
            <text:p>Updated stock visible in product list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INVENT-63</text:p>
          </table:table-cell>
          <table:table-cell table:style-name="ce10" office:value-type="string" calcext:value-type="string">
            <text:p>Record Stock Movement (Manual OUT)</text:p>
          </table:table-cell>
          <table:table-cell table:style-name="ce11" office:value-type="string" calcext:value-type="string">
            <text:p>Inventory Management </text:p>
          </table:table-cell>
          <table:table-cell table:style-name="ce12" office:value-type="string" calcext:value-type="string">
            <text:p>UC-12 Inventory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is logged in; Product has sufficient stock; Stock movement form is accessible</text:p>
          </table:table-cell>
          <table:table-cell table:style-name="ce10" office:value-type="string" calcext:value-type="string">
            <text:p>Product: Keyboard</text:p>
            <text:p>Movement Type: OUT</text:p>
            <text:p>Quantity: 5</text:p>
            <text:p>Reason: DAMAGED</text:p>
          </table:table-cell>
          <table:table-cell table:style-name="ce10" office:value-type="string" calcext:value-type="string">
            <text:p>1. Login successfully</text:p>
            <text:p>2. Navigate to Inventory &gt; Stock Movement</text:p>
            <text:p>3. Click "Record Movement"</text:p>
            <text:p>4. Select product "Keyboard"</text:p>
            <text:p>5. Select type "OUT"</text:p>
            <text:p>6. Enter quantity "5"</text:p>
            <text:p>7. Select reason "DAMAGED"</text:p>
            <text:p>8. Click "Save"</text:p>
          </table:table-cell>
          <table:table-cell table:style-name="ce10" office:value-type="string" calcext:value-type="string">
            <text:p>Movement is recorded</text:p>
            <text:p>Keyboard stock decreases by 5</text:p>
            <text:p>Movement appears in history with "OUT" type</text:p>
            <text:p>Reason shows "DAMAGED"</text:p>
            <text:p>Updated stock visible in product list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2">
          <table:table-cell table:style-name="ce7" office:value-type="string" calcext:value-type="string">
            <text:p>TC-INVENT-64</text:p>
          </table:table-cell>
          <table:table-cell table:style-name="ce10" office:value-type="string" calcext:value-type="string">
            <text:p>Low Stock Alert and Verification</text:p>
          </table:table-cell>
          <table:table-cell table:style-name="ce11" office:value-type="string" calcext:value-type="string">
            <text:p>Inventory Management </text:p>
          </table:table-cell>
          <table:table-cell table:style-name="ce12" office:value-type="string" calcext:value-type="string">
            <text:p>UC-12 Inventory Management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Product with low stock limit exists; Current stock is at or below limit</text:p>
          </table:table-cell>
          <table:table-cell table:style-name="ce10" office:value-type="string" calcext:value-type="string">
            <text:p>Product: Mouse</text:p>
            <text:p>Stock: 5</text:p>
            <text:p>Low Stock Limit: 10</text:p>
          </table:table-cell>
          <table:table-cell table:style-name="ce10" office:value-type="string" calcext:value-type="string">
            <text:p>1. Login successfully</text:p>
            <text:p>2. Navigate to /products</text:p>
            <text:p>3. Locate product "Mouse" with low stock</text:p>
            <text:p>4. Verify visual indicator (red, warning badge)</text:p>
            <text:p>5. View product detail</text:p>
            <text:p>6. Verify low stock warning is displayed</text:p>
            <text:p>7. Navigate to dashboard</text:p>
            <text:p>8. Verify low stock alert on dashboard (if applicable)</text:p>
          </table:table-cell>
          <table:table-cell table:style-name="ce10" office:value-type="string" calcext:value-type="string">
            <text:p>Low stock products are visually marked</text:p>
            <text:p>Badge or color indicates warning</text:p>
            <text:p>Product detail shows warning message</text:p>
            <text:p>Staff is alerted to reorder items</text:p>
            <text:p>Dashboard shows low stock summary (if available)</text:p>
            <text:p>Users can quickly identify reorder needs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4">
          <table:table-cell table:style-name="ce7" office:value-type="string" calcext:value-type="string">
            <text:p>TC-E2E-65</text:p>
          </table:table-cell>
          <table:table-cell table:style-name="ce10" office:value-type="string" calcext:value-type="string">
            <text:p>Complete Sales Workflow (Register → Login → Create Sale → Download Invoice)</text:p>
          </table:table-cell>
          <table:table-cell table:style-name="ce11" office:value-type="string" calcext:value-type="string">
            <text:p>End-to-End Sales Workflow</text:p>
          </table:table-cell>
          <table:table-cell table:style-name="ce12" office:value-type="string" calcext:value-type="string">
            <text:p>UC-13 E2E Workflows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System is fully operational; Database is clean</text:p>
          </table:table-cell>
          <table:table-cell table:style-name="ce10" office:value-type="string" calcext:value-type="string">
            <text:p>New User: newe2e@company.com / ValidPass123!</text:p>
            <text:p>Customer: Jane Doe</text:p>
            <text:p>Products: Laptop (2), Mouse (1)</text:p>
            <text:p>Discount: 2000</text:p>
          </table:table-cell>
          <table:table-cell table:style-name="ce10" office:value-type="string" calcext:value-type="string">
            <text:p>1. Navigate to sign-up page</text:p>
            <text:p>2. Register new user: newe2e@company.com</text:p>
            <text:p>3. User is auto-logged in</text:p>
            <text:p>4. Verify dashboard loads</text:p>
            <text:p>5. Navigate to /customers</text:p>
            <text:p>6. Create new customer "Jane Doe"</text:p>
            <text:p>7. Navigate to /sales</text:p>
            <text:p>8. Create new sale:</text:p>
            <text:p>   - Select customer "Jane Doe"</text:p>
            <text:p>   - Add Laptop (qty: 2)</text:p>
            <text:p>   - Add Mouse (qty: 1)</text:p>
            <text:p>   - Apply discount 2000</text:p>
            <text:p>   - Set payment method: Card</text:p>
            <text:p>   - Complete sale</text:p>
            <text:p>9. Verify sale created successfully</text:p>
            <text:p>10. Click sale in list</text:p>
            <text:p>11. Click "Download Invoice"</text:p>
            <text:p>12. Verify PDF downloads</text:p>
            <text:p>13. Verify stock levels decreased</text:p>
          </table:table-cell>
          <table:table-cell table:style-name="ce10" office:value-type="string" calcext:value-type="string">
            <text:p>Registration succeeds</text:p>
            <text:p>User is logged in automatically</text:p>
            <text:p>Customer is created</text:p>
            <text:p>Sale is created with all items</text:p>
            <text:p>Stock is updated (Laptop -2, Mouse -1)</text:p>
            <text:p>Invoice is generated and downloads</text:p>
            <text:p>All data persists correctly</text:p>
            <text:p>User journey is seamless without errors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4">
          <table:table-cell table:style-name="ce7" office:value-type="string" calcext:value-type="string">
            <text:p>TC-E2E-66</text:p>
          </table:table-cell>
          <table:table-cell table:style-name="ce10" office:value-type="string" calcext:value-type="string">
            <text:p>Inventory Management Workflow (Add Product → Record Stock → Verify Low Stock Alert)</text:p>
          </table:table-cell>
          <table:table-cell table:style-name="ce11" office:value-type="string" calcext:value-type="string">
            <text:p>End-to-End Inventory Workflow</text:p>
          </table:table-cell>
          <table:table-cell table:style-name="ce12" office:value-type="string" calcext:value-type="string">
            <text:p>UC-13 E2E Workflows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User has Admin/Manager role; Suppliers and categories exist</text:p>
          </table:table-cell>
          <table:table-cell table:style-name="ce10" office:value-type="string" calcext:value-type="string">
            <text:p>Product: USB Cable</text:p>
            <text:p>SKU: CABLE-001</text:p>
            <text:p>Low Stock Limit: 20</text:p>
            <text:p>Initial Stock: 50</text:p>
            <text:p>Outbound Qty: 35</text:p>
          </table:table-cell>
          <table:table-cell table:style-name="ce10" office:value-type="string" calcext:value-type="string">
            <text:p>1. Login successfully</text:p>
            <text:p>2. Navigate to /products</text:p>
            <text:p>3. Create new product "USB Cable":</text:p>
            <text:p>   - SKU: CABLE-001</text:p>
            <text:p>   - Cost: 100, Selling: 200</text:p>
            <text:p>   - Initial Stock: 50</text:p>
            <text:p>   - Low Stock Limit: 20</text:p>
            <text:p>4. Verify product created</text:p>
            <text:p>5. Navigate to Inventory &gt; Stock Movement</text:p>
            <text:p>6. Record stock OUT for USB Cable:</text:p>
            <text:p>   - Quantity: 35</text:p>
            <text:p>   - Reason: SALE (or MANUAL)</text:p>
            <text:p>7. Verify movement recorded</text:p>
            <text:p>8. Check product stock: should be 15 (50-35)</text:p>
            <text:p>9. Navigate to /products</text:p>
            <text:p>10. Verify USB Cable shows low stock indicator</text:p>
          </table:table-cell>
          <table:table-cell table:style-name="ce10" office:value-type="string" calcext:value-type="string">
            <text:p>Product is created with correct details</text:p>
            <text:p>Initial stock is set to 50</text:p>
            <text:p>Stock movement is recorded</text:p>
            <text:p>Product stock updates to 15</text:p>
            <text:p>Low stock alert is triggered (15 &lt; 20)</text:p>
            <text:p>Product displays warning badge in list</text:p>
            <text:p>All data is consistent across modules</text:p>
          </table:table-cell>
          <table:table-cell table:style-name="ce18"/>
          <table:table-cell table:style-name="ce19" office:value-type="string" calcext:value-type="string">
            <text:p>Not Run</text:p>
          </table:table-cell>
        </table:table-row>
        <table:table-row table:style-name="ro4">
          <table:table-cell table:style-name="ce7" office:value-type="string" calcext:value-type="string">
            <text:p>TC-E2E-67</text:p>
          </table:table-cell>
          <table:table-cell table:style-name="ce10" office:value-type="string" calcext:value-type="string">
            <text:p>Order Management Workflow (Customer → Products → Sale → Payment)</text:p>
          </table:table-cell>
          <table:table-cell table:style-name="ce11" office:value-type="string" calcext:value-type="string">
            <text:p>End-to-End Order Management</text:p>
          </table:table-cell>
          <table:table-cell table:style-name="ce12" office:value-type="string" calcext:value-type="string">
            <text:p>UC-13 E2E Workflows</text:p>
          </table:table-cell>
          <table:table-cell table:style-name="ce13" office:value-type="string" calcext:value-type="string">
            <text:p>Positive</text:p>
          </table:table-cell>
          <table:table-cell table:style-name="ce12" office:value-type="string" calcext:value-type="string">
            <text:p>High</text:p>
          </table:table-cell>
          <table:table-cell table:style-name="ce16" office:value-type="string" calcext:value-type="string">
            <text:p>Customers, products, and staff users exist in system</text:p>
          </table:table-cell>
          <table:table-cell table:style-name="ce10" office:value-type="string" calcext:value-type="string">
            <text:p>Customer: Michael Johnson</text:p>
            <text:p>Items: Laptop, Monitor, Keyboard</text:p>
            <text:p>Payment Method: Net Banking</text:p>
            <text:p>Payment Status: Pending → Completed</text:p>
          </table:table-cell>
          <table:table-cell table:style-name="ce10" office:value-type="string" calcext:value-type="string">
            <text:p>1. Login as staff user</text:p>
            <text:p>2. Navigate to /customers</text:p>
            <text:p>3. View Michael Johnson details</text:p>
            <text:p>4. Navigate to /sales</text:p>
            <text:p>5. Create new sale for Michael Johnson:</text:p>
            <text:p>   - Add Laptop (qty: 1, price: 50000)</text:p>
            <text:p>   - Add Monitor (qty: 2, price: 15000)</text:p>
            <text:p>   - Add Keyboard (qty: 1, price: 2500)</text:p>
            <text:p>   - Set discount: 5000</text:p>
            <text:p>   - Payment Method: Net Banking</text:p>
            <text:p>   - Payment Status: Pending</text:p>
            <text:p>6. Save sale (payment pending)</text:p>
            <text:p>7. Verify sale appears with "Pending" status</text:p>
            <text:p>8. Open sale again</text:p>
            <text:p>9. Click "Update Payment Status"</text:p>
            <text:p>10. Change to "Completed"</text:p>
            <text:p>11. Save changes</text:p>
            <text:p>12. Verify status updates in list</text:p>
          </table:table-cell>
          <table:table-cell table:style-name="ce10" office:value-type="string" calcext:value-type="string">
            <text:p>Sale is created with all items</text:p>
            <text:p>Total is calculated correctly: (50000 + 30000 + 2500 - 5000) = 77500</text:p>
            <text:p>Payment status is "Pending" initially</text:p>
            <text:p>Payment status can be updated</text:p>
            <text:p>Sale detail shows current status</text:p>
            <text:p>Order history is maintained</text:p>
            <text:p>All calculations are accurate</text:p>
          </table:table-cell>
          <table:table-cell table:style-name="ce17"/>
          <table:table-cell table:style-name="ce19" office:value-type="string" calcext:value-type="string">
            <text:p>Not Run</text:p>
          </table:table-cell>
        </table:table-row>
        <table:table-row table:style-name="ro5" table:number-rows-repeated="1048507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Use Cases" table:style-name="ta1">
        <table:table-column table:style-name="co13" table:default-cell-style-name="ce30"/>
        <table:table-column table:style-name="co14" table:default-cell-style-name="ce32"/>
        <table:table-column table:style-name="co15" table:default-cell-style-name="ce33"/>
        <table:table-column table:style-name="co14" table:default-cell-style-name="ce35"/>
        <table:table-row table:style-name="ro7">
          <table:table-cell table:style-name="ce29" office:value-type="string" calcext:value-type="string">
            <text:p>Use Case ID</text:p>
          </table:table-cell>
          <table:table-cell table:style-name="ce29" office:value-type="string" calcext:value-type="string">
            <text:p>Use Case 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Primary Actor(s)</text:p>
          </table:table-cell>
        </table:table-row>
        <table:table-row table:style-name="ro8">
          <table:table-cell office:value-type="string" calcext:value-type="string">
            <text:p>UC-01</text:p>
          </table:table-cell>
          <table:table-cell table:style-name="ce31" office:value-type="string" calcext:value-type="string">
            <text:p>User Registration</text:p>
          </table:table-cell>
          <table:table-cell office:value-type="string" calcext:value-type="string">
            <text:p>New users register, system validates the input and create account</text:p>
          </table:table-cell>
          <table:table-cell office:value-type="string" calcext:value-type="string">
            <text:p>Staff, Manager, Admin</text:p>
          </table:table-cell>
        </table:table-row>
        <table:table-row table:style-name="ro8">
          <table:table-cell office:value-type="string" calcext:value-type="string">
            <text:p>UC-02</text:p>
          </table:table-cell>
          <table:table-cell office:value-type="string" calcext:value-type="string">
            <text:p>User Login</text:p>
          </table:table-cell>
          <table:table-cell table:style-name="ce34" office:value-type="string" calcext:value-type="string">
            <text:p>Users log in with role-based access.</text:p>
          </table:table-cell>
          <table:table-cell office:value-type="string" calcext:value-type="string">
            <text:p>Staff, Manager, Admin</text:p>
          </table:table-cell>
        </table:table-row>
        <table:table-row table:style-name="ro8">
          <table:table-cell office:value-type="string" calcext:value-type="string">
            <text:p>UC-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Users end their current session safely.</text:p>
          </table:table-cell>
          <table:table-cell office:value-type="string" calcext:value-type="string">
            <text:p>Staff, Manager, Admin</text:p>
          </table:table-cell>
        </table:table-row>
        <table:table-row table:style-name="ro9">
          <table:table-cell office:value-type="string" calcext:value-type="string">
            <text:p>UC-04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Users request password reset securely.</text:p>
          </table:table-cell>
          <table:table-cell office:value-type="string" calcext:value-type="string">
            <text:p>Staff, Manager, Admin</text:p>
          </table:table-cell>
        </table:table-row>
        <table:table-row table:style-name="ro9">
          <table:table-cell office:value-type="string" calcext:value-type="string">
            <text:p>UC-05</text:p>
          </table:table-cell>
          <table:table-cell office:value-type="string" calcext:value-type="string">
            <text:p>Session Management</text:p>
          </table:table-cell>
          <table:table-cell office:value-type="string" calcext:value-type="string">
            <text:p>System manages sessions and enforces session security policies</text:p>
          </table:table-cell>
          <table:table-cell office:value-type="string" calcext:value-type="string">
            <text:p>Admin, System</text:p>
          </table:table-cell>
        </table:table-row>
        <table:table-row table:style-name="ro10">
          <table:table-cell office:value-type="string" calcext:value-type="string">
            <text:p>UC-06</text:p>
          </table:table-cell>
          <table:table-cell office:value-type="string" calcext:value-type="string">
            <text:p>Role Based Access</text:p>
          </table:table-cell>
          <table:table-cell office:value-type="string" calcext:value-type="string">
            <text:p>Admin assigns roles and permissions, System enforces access control across features and data</text:p>
          </table:table-cell>
          <table:table-cell office:value-type="string" calcext:value-type="string">
            <text:p>Admin</text:p>
          </table:table-cell>
        </table:table-row>
        <table:table-row table:style-name="ro8">
          <table:table-cell office:value-type="string" calcext:value-type="string">
            <text:p>UC-07</text:p>
          </table:table-cell>
          <table:table-cell office:value-type="string" calcext:value-type="string">
            <text:p>Input Validation</text:p>
          </table:table-cell>
          <table:table-cell office:value-type="string" calcext:value-type="string">
            <text:p>System validates input and prevents invalid data from being saved</text:p>
          </table:table-cell>
          <table:table-cell office:value-type="string" calcext:value-type="string">
            <text:p>System, Staff</text:p>
          </table:table-cell>
        </table:table-row>
        <table:table-row table:style-name="ro8">
          <table:table-cell office:value-type="string" calcext:value-type="string">
            <text:p>UC-08</text:p>
          </table:table-cell>
          <table:table-cell office:value-type="string" calcext:value-type="string">
            <text:p>Dashboard Navigation</text:p>
          </table:table-cell>
          <table:table-cell office:value-type="string" calcext:value-type="string">
            <text:p>Authorized users view dashboard, apply filters and navigate</text:p>
          </table:table-cell>
          <table:table-cell office:value-type="string" calcext:value-type="string">
            <text:p>Manager, Admin, Staff</text:p>
          </table:table-cell>
        </table:table-row>
        <table:table-row table:style-name="ro10">
          <table:table-cell office:value-type="string" calcext:value-type="string">
            <text:p>UC-09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Users create, edit, categorize and delete products <text:s/>whole preserving history and inventory records</text:p>
          </table:table-cell>
          <table:table-cell office:value-type="string" calcext:value-type="string">
            <text:p>Admin, Staff</text:p>
          </table:table-cell>
        </table:table-row>
        <table:table-row table:style-name="ro10">
          <table:table-cell office:value-type="string" calcext:value-type="string">
            <text:p>UC-10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Staff create and process sales transactions, apply discounts, generate invoices/receipts and record sales</text:p>
          </table:table-cell>
          <table:table-cell office:value-type="string" calcext:value-type="string">
            <text:p>Staff, Manager, Admin</text:p>
          </table:table-cell>
        </table:table-row>
        <table:table-row table:style-name="ro10">
          <table:table-cell office:value-type="string" calcext:value-type="string">
            <text:p>UC-11</text:p>
          </table:table-cell>
          <table:table-cell office:value-type="string" calcext:value-type="string">
            <text:p>Customer Management</text:p>
          </table:table-cell>
          <table:table-cell office:value-type="string" calcext:value-type="string">
            <text:p>Users add, update and view customer profiles; track purchase history and customer-specific notes</text:p>
          </table:table-cell>
          <table:table-cell office:value-type="string" calcext:value-type="string">
            <text:p>Staff, Manager, Admin</text:p>
          </table:table-cell>
        </table:table-row>
        <table:table-row table:style-name="ro10">
          <table:table-cell office:value-type="string" calcext:value-type="string">
            <text:p>UC-12</text:p>
          </table:table-cell>
          <table:table-cell office:value-type="string" calcext:value-type="string">
            <text:p>Inventory Management</text:p>
          </table:table-cell>
          <table:table-cell office:value-type="string" calcext:value-type="string">
            <text:p>Users record stock receipts, transfers, adjustments and counts; system tracks quantities, locations and low-stock alerts</text:p>
          </table:table-cell>
          <table:table-cell office:value-type="string" calcext:value-type="string">
            <text:p>Staff, Manager, Admin</text:p>
          </table:table-cell>
        </table:table-row>
        <table:table-row table:style-name="ro10">
          <table:table-cell office:value-type="string" calcext:value-type="string">
            <text:p>UC-13</text:p>
          </table:table-cell>
          <table:table-cell office:value-type="string" calcext:value-type="string">
            <text:p>E2E workflows</text:p>
          </table:table-cell>
          <table:table-cell office:value-type="string" calcext:value-type="string">
            <text:p>Cross-functional end-to-end flows combining inventory, sales, invoicing and reporting</text:p>
          </table:table-cell>
          <table:table-cell office:value-type="string" calcext:value-type="string">
            <text:p>Staff, Manager, Admin, System</text:p>
          </table:table-cell>
        </table:table-row>
        <table:table-row table:style-name="ro11" table:number-rows-repeated="2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  <table:database-ranges>
        <table:database-range table:name="__Anonymous_Sheet_DB__0" table:target-range-address="'Test Cases'.A1:'Test Cases'.K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09:44:47.987119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0:35:44.659809359</meta:creation-date>
    <meta:editing-duration>PT35M21S</meta:editing-duration>
    <meta:editing-cycles>6</meta:editing-cycles>
    <meta:generator>LibreOffice/24.2.7.2$Linux_X86_64 LibreOffice_project/420$Build-2</meta:generator>
    <dc:date>2026-05-21T13:24:05.691342738</dc:date>
    <meta:document-statistic meta:table-count="2" meta:cell-count="805" meta:object-count="0"/>
  </office:meta>
</office:document-meta>
</file>